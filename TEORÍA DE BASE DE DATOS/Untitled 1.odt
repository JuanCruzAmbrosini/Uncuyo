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upply" svg:font-family="Supply" style:font-pitch="variable"/>
  </office:font-face-decls>
  <office:automatic-styles>
    <style:style style:name="P1" style:family="paragraph" style:parent-style-name="Standard">
      <style:text-properties style:font-name="Supply" style:text-underline-style="solid" style:text-underline-width="auto" style:text-underline-color="#ff0000" officeooo:rsid="001ffb5b" officeooo:paragraph-rsid="001ffb5b"/>
    </style:style>
    <style:style style:name="P2" style:family="paragraph" style:parent-style-name="Standard" style:list-style-name="L1">
      <style:text-properties officeooo:paragraph-rsid="001ffb5b"/>
    </style:style>
    <style:style style:name="P3" style:family="paragraph" style:parent-style-name="Standard" style:list-style-name="L2">
      <style:text-properties style:use-window-font-color="true" loext:opacity="0%" style:font-name="Supply" style:text-underline-style="none" fo:font-weight="normal" officeooo:rsid="0022345d" officeooo:paragraph-rsid="0022345d" style:font-weight-asian="normal" style:font-weight-complex="normal"/>
    </style:style>
    <style:style style:name="P4" style:family="paragraph" style:parent-style-name="Standard" style:list-style-name="L2">
      <style:text-properties style:use-window-font-color="true" loext:opacity="0%" style:font-name="Supply" style:text-underline-style="none" fo:font-weight="normal" officeooo:rsid="0022758a" officeooo:paragraph-rsid="0022758a" style:font-weight-asian="normal" style:font-weight-complex="normal"/>
    </style:style>
    <style:style style:name="P5" style:family="paragraph" style:parent-style-name="Standard" style:list-style-name="L2">
      <style:text-properties style:use-window-font-color="true" loext:opacity="0%" style:font-name="Supply" style:text-underline-style="none" fo:font-weight="normal" officeooo:rsid="00245167" officeooo:paragraph-rsid="00245167" style:font-weight-asian="normal" style:font-weight-complex="normal"/>
    </style:style>
    <style:style style:name="P6" style:family="paragraph" style:parent-style-name="Standard">
      <style:text-properties style:use-window-font-color="true" loext:opacity="0%" style:font-name="Supply" style:text-underline-style="solid" style:text-underline-width="auto" style:text-underline-color="#ff0000" fo:font-weight="normal" officeooo:rsid="0025c758" officeooo:paragraph-rsid="0025c758" style:font-weight-asian="normal" style:font-weight-complex="normal"/>
    </style:style>
    <style:style style:name="P7" style:family="paragraph" style:parent-style-name="Standard">
      <style:text-properties style:use-window-font-color="true" loext:opacity="0%" style:font-name="Supply" style:text-underline-style="none" fo:font-weight="normal" officeooo:rsid="0025c758" officeooo:paragraph-rsid="0025c758" style:font-weight-asian="normal" style:font-weight-complex="normal"/>
    </style:style>
    <style:style style:name="P8" style:family="paragraph" style:parent-style-name="Standard" style:list-style-name="L3">
      <style:text-properties style:use-window-font-color="true" loext:opacity="0%" style:font-name="Supply" style:text-underline-style="none" fo:font-weight="normal" officeooo:rsid="00269fd1" officeooo:paragraph-rsid="00269fd1" style:font-weight-asian="normal" style:font-weight-complex="normal"/>
    </style:style>
    <style:style style:name="P9" style:family="paragraph" style:parent-style-name="Standard" style:list-style-name="L3">
      <style:text-properties style:use-window-font-color="true" loext:opacity="0%" style:font-name="Supply" style:text-underline-style="none" fo:font-weight="normal" officeooo:rsid="002960cb" officeooo:paragraph-rsid="002960cb" style:font-weight-asian="normal" style:font-weight-complex="normal"/>
    </style:style>
    <style:style style:name="P10" style:family="paragraph" style:parent-style-name="Standard" style:list-style-name="L4">
      <style:text-properties style:use-window-font-color="true" loext:opacity="0%" style:font-name="Supply" style:text-underline-style="none" fo:font-weight="normal" officeooo:rsid="002a7583" officeooo:paragraph-rsid="002a7583" style:font-weight-asian="normal" style:font-weight-complex="normal"/>
    </style:style>
    <style:style style:name="P11" style:family="paragraph" style:parent-style-name="Standard">
      <style:text-properties style:use-window-font-color="true" loext:opacity="0%" style:font-name="Supply" style:text-underline-style="solid" style:text-underline-width="auto" style:text-underline-color="#ff0000" fo:font-weight="normal" officeooo:rsid="002a7583" officeooo:paragraph-rsid="002a7583" style:font-weight-asian="normal" style:font-weight-complex="normal"/>
    </style:style>
    <style:style style:name="P12" style:family="paragraph" style:parent-style-name="Standard">
      <style:text-properties style:use-window-font-color="true" loext:opacity="0%" style:font-name="Supply" style:text-underline-style="none" fo:font-weight="normal" officeooo:rsid="002b54cf" officeooo:paragraph-rsid="002a7583" style:font-weight-asian="normal" style:font-weight-complex="normal"/>
    </style:style>
    <style:style style:name="P13" style:family="paragraph" style:parent-style-name="Standard" style:list-style-name="L5">
      <style:text-properties style:use-window-font-color="true" loext:opacity="0%" style:font-name="Supply" style:text-underline-style="none" fo:font-weight="normal" officeooo:rsid="002b54cf" officeooo:paragraph-rsid="002b54cf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Supply" style:text-underline-style="none" fo:font-weight="normal" officeooo:rsid="002b54cf" officeooo:paragraph-rsid="002b54cf" style:font-weight-asian="normal" style:font-weight-complex="normal"/>
    </style:style>
    <style:style style:name="P15" style:family="paragraph" style:parent-style-name="Standard" style:list-style-name="L6">
      <style:text-properties style:use-window-font-color="true" loext:opacity="0%" style:font-name="Supply" style:text-underline-style="none" fo:font-weight="normal" officeooo:rsid="002c7048" officeooo:paragraph-rsid="002c7048" style:font-weight-asian="normal" style:font-weight-complex="normal"/>
    </style:style>
    <style:style style:name="P16" style:family="paragraph" style:parent-style-name="Standard">
      <style:text-properties style:use-window-font-color="true" loext:opacity="0%" style:font-name="Supply" style:text-underline-style="solid" style:text-underline-width="auto" style:text-underline-color="#ff0000" fo:font-weight="normal" officeooo:rsid="002c7048" officeooo:paragraph-rsid="002c7048" style:font-weight-asian="normal" style:font-weight-complex="normal"/>
    </style:style>
    <style:style style:name="P17" style:family="paragraph" style:parent-style-name="Standard">
      <style:text-properties style:use-window-font-color="true" loext:opacity="0%" style:font-name="Supply" style:text-underline-style="none" fo:font-weight="normal" officeooo:rsid="002c7048" officeooo:paragraph-rsid="002c7048" style:font-weight-asian="normal" style:font-weight-complex="normal"/>
    </style:style>
    <style:style style:name="P18" style:family="paragraph" style:parent-style-name="Standard" style:list-style-name="L7">
      <style:text-properties style:use-window-font-color="true" loext:opacity="0%" style:font-name="Supply" style:text-underline-style="none" fo:font-weight="normal" officeooo:rsid="002c7048" officeooo:paragraph-rsid="002c7048" style:font-weight-asian="normal" style:font-weight-complex="normal"/>
    </style:style>
    <style:style style:name="P19" style:family="paragraph" style:parent-style-name="Standard" style:list-style-name="L8">
      <style:text-properties style:use-window-font-color="true" loext:opacity="0%" style:font-name="Supply" style:text-underline-style="none" fo:font-weight="normal" officeooo:rsid="002d8b09" officeooo:paragraph-rsid="002f672c" style:font-weight-asian="normal" style:font-weight-complex="normal"/>
    </style:style>
    <style:style style:name="P20" style:family="paragraph" style:parent-style-name="Standard" style:list-style-name="L8">
      <style:text-properties style:use-window-font-color="true" loext:opacity="0%" style:font-name="Supply" style:text-underline-style="none" fo:font-weight="normal" officeooo:rsid="002f672c" officeooo:paragraph-rsid="002f981b" style:font-weight-asian="normal" style:font-weight-complex="normal"/>
    </style:style>
    <style:style style:name="P21" style:family="paragraph" style:parent-style-name="Standard" style:list-style-name="L8">
      <style:text-properties style:use-window-font-color="true" loext:opacity="0%" style:font-name="Supply" style:text-underline-style="none" fo:font-weight="normal" officeooo:rsid="002f981b" officeooo:paragraph-rsid="002f981b" style:font-weight-asian="normal" style:font-weight-complex="normal"/>
    </style:style>
    <style:style style:name="P22" style:family="paragraph" style:parent-style-name="Standard" style:list-style-name="L8">
      <style:text-properties style:use-window-font-color="true" loext:opacity="0%" style:font-name="Supply" style:text-underline-style="none" fo:font-weight="normal" officeooo:rsid="002d8b09" officeooo:paragraph-rsid="002fd62d" style:font-weight-asian="normal" style:font-weight-complex="normal"/>
    </style:style>
    <style:style style:name="P23" style:family="paragraph" style:parent-style-name="Standard" style:list-style-name="L8">
      <style:text-properties style:use-window-font-color="true" loext:opacity="0%" style:font-name="Supply" style:text-underline-style="none" fo:font-weight="normal" officeooo:rsid="002fd62d" officeooo:paragraph-rsid="002fd62d" style:font-weight-asian="normal" style:font-weight-complex="normal"/>
    </style:style>
    <style:style style:name="P24" style:family="paragraph" style:parent-style-name="Standard" style:list-style-name="L8">
      <style:text-properties style:use-window-font-color="true" loext:opacity="0%" style:font-name="Supply" style:text-underline-style="none" fo:font-weight="normal" officeooo:rsid="0032069d" officeooo:paragraph-rsid="0032069d" style:font-weight-asian="normal" style:font-weight-complex="normal"/>
    </style:style>
    <style:style style:name="P25" style:family="paragraph" style:parent-style-name="Standard">
      <style:text-properties style:use-window-font-color="true" loext:opacity="0%" style:font-name="Supply" style:text-underline-style="solid" style:text-underline-width="auto" style:text-underline-color="#ff0000" fo:font-weight="normal" officeooo:rsid="00330250" officeooo:paragraph-rsid="0033bd4e" style:font-weight-asian="normal" style:font-weight-complex="normal"/>
    </style:style>
    <style:style style:name="P26" style:family="paragraph" style:parent-style-name="Standard" style:list-style-name="L9">
      <style:text-properties style:use-window-font-color="true" loext:opacity="0%" style:font-name="Supply" style:text-underline-style="none" fo:font-weight="normal" officeooo:rsid="0033bd4e" officeooo:paragraph-rsid="0033bd4e" style:font-weight-asian="normal" style:font-weight-complex="normal"/>
    </style:style>
    <style:style style:name="P27" style:family="paragraph" style:parent-style-name="Standard" style:list-style-name="L9">
      <style:text-properties style:use-window-font-color="true" loext:opacity="0%" style:font-name="Supply" style:text-underline-style="none" fo:font-weight="normal" officeooo:rsid="00347fb4" officeooo:paragraph-rsid="00347fb4" style:font-weight-asian="normal" style:font-weight-complex="normal"/>
    </style:style>
    <style:style style:name="P28" style:family="paragraph" style:parent-style-name="Standard" style:list-style-name="L9">
      <style:text-properties officeooo:paragraph-rsid="00347fb4"/>
    </style:style>
    <style:style style:name="P29" style:family="paragraph" style:parent-style-name="Standard" style:list-style-name="L9">
      <style:text-properties style:use-window-font-color="true" loext:opacity="0%" style:font-name="Supply" style:text-underline-style="none" fo:font-weight="normal" officeooo:rsid="0034f7be" officeooo:paragraph-rsid="0034f7be" style:font-weight-asian="normal" style:font-weight-complex="normal"/>
    </style:style>
    <style:style style:name="P30" style:family="paragraph" style:parent-style-name="Standard" style:list-style-name="L9">
      <style:text-properties style:use-window-font-color="true" loext:opacity="0%" style:font-name="Supply" style:text-underline-style="none" fo:font-weight="normal" officeooo:rsid="00347fb4" officeooo:paragraph-rsid="0034f7be" style:font-weight-asian="normal" style:font-weight-complex="normal"/>
    </style:style>
    <style:style style:name="P31" style:family="paragraph" style:parent-style-name="Standard" style:list-style-name="L9">
      <style:text-properties officeooo:paragraph-rsid="0033bd4e"/>
    </style:style>
    <style:style style:name="P32" style:family="paragraph" style:parent-style-name="Standard">
      <style:paragraph-properties fo:break-before="page"/>
      <style:text-properties style:use-window-font-color="true" loext:opacity="0%" style:font-name="Supply" style:text-underline-style="solid" style:text-underline-width="auto" style:text-underline-color="#ff0000" fo:font-weight="normal" officeooo:rsid="00330250" officeooo:paragraph-rsid="00330250" style:font-weight-asian="normal" style:font-weight-complex="normal"/>
    </style:style>
    <style:style style:name="T1" style:family="text">
      <style:text-properties style:use-window-font-color="true" loext:opacity="0%" style:font-name="Supply" style:text-underline-style="none" officeooo:rsid="001ffb5b"/>
    </style:style>
    <style:style style:name="T2" style:family="text">
      <style:text-properties fo:color="#ff0000" loext:opacity="100%" style:font-name="Supply" style:text-underline-style="none" officeooo:rsid="001ffb5b">
        <loext:char-complex-color loext:theme-type="accent1" loext:color-type="theme">
          <loext:transformation loext:type="lumoff" loext:value="0"/>
        </loext:char-complex-color>
      </style:text-properties>
    </style:style>
    <style:style style:name="T3" style:family="text">
      <style:text-properties fo:color="#ff0000" loext:opacity="100%" style:font-name="Supply" style:text-underline-style="none" officeooo:rsid="001ffb5b"/>
    </style:style>
    <style:style style:name="T4" style:family="text">
      <style:text-properties fo:color="#00b2b5" loext:opacity="100%" style:font-name="Supply" style:text-underline-style="none" officeooo:rsid="001ffb5b"/>
    </style:style>
    <style:style style:name="T5" style:family="text">
      <style:text-properties fo:color="#ff0000" loext:opacity="100%" style:font-name="Supply" style:text-underline-style="none" officeooo:rsid="0020c530"/>
    </style:style>
    <style:style style:name="T6" style:family="text">
      <style:text-properties style:use-window-font-color="true" loext:opacity="0%" style:font-name="Supply" style:text-underline-style="none" officeooo:rsid="0020c530"/>
    </style:style>
    <style:style style:name="T7" style:family="text">
      <style:text-properties fo:color="#6803ff" loext:opacity="100%" style:font-name="Supply" style:text-underline-style="none" officeooo:rsid="0020c530"/>
    </style:style>
    <style:style style:name="T8" style:family="text">
      <style:text-properties style:use-window-font-color="true" loext:opacity="0%" style:text-position="sub 58%" style:font-name="Supply" style:text-underline-style="none" officeooo:rsid="0020c530"/>
    </style:style>
    <style:style style:name="T9" style:family="text">
      <style:text-properties style:use-window-font-color="true" loext:opacity="0%" style:text-position="0% 100%" style:font-name="Supply" style:text-underline-style="none" officeooo:rsid="0020c530"/>
    </style:style>
    <style:style style:name="T10" style:family="text">
      <style:text-properties fo:color="#6803ff" loext:opacity="100%" style:text-position="0% 100%" style:font-name="Supply" style:text-underline-style="none" officeooo:rsid="0020c530"/>
    </style:style>
    <style:style style:name="T11" style:family="text">
      <style:text-properties fo:color="#00b2b5" loext:opacity="100%" style:text-position="0% 100%" style:font-name="Supply" style:text-underline-style="none" officeooo:rsid="0020c530">
        <loext:char-complex-color loext:theme-type="dark2" loext:color-type="theme">
          <loext:transformation loext:type="lumoff" loext:value="0"/>
        </loext:char-complex-color>
      </style:text-properties>
    </style:style>
    <style:style style:name="T12" style:family="text">
      <style:text-properties fo:color="#00b2b5" loext:opacity="100%" style:text-position="0% 100%" style:font-name="Supply" style:text-underline-style="none" fo:font-weight="normal" officeooo:rsid="0020c530" style:font-weight-asian="normal" style:font-weight-complex="normal"/>
    </style:style>
    <style:style style:name="T13" style:family="text">
      <style:text-properties style:use-window-font-color="true" loext:opacity="0%" style:text-position="0% 100%" style:font-name="Supply" style:text-underline-style="none" fo:font-weight="normal" officeooo:rsid="0020c530" style:font-weight-asian="normal" style:font-weight-complex="normal"/>
    </style:style>
    <style:style style:name="T14" style:family="text">
      <style:text-properties style:use-window-font-color="true" loext:opacity="0%" style:text-position="sub 58%" style:font-name="Supply" style:text-underline-style="none" fo:font-weight="normal" officeooo:rsid="0020c530" style:font-weight-asian="normal" style:font-weight-complex="normal"/>
    </style:style>
    <style:style style:name="T15" style:family="text">
      <style:text-properties fo:color="#6803ff" loext:opacity="100%" style:text-position="0% 100%" style:font-name="Supply" style:text-underline-style="none" fo:font-weight="normal" officeooo:rsid="0020c530" style:font-weight-asian="normal" style:font-weight-complex="normal">
        <loext:char-complex-color loext:theme-type="light1" loext:color-type="theme">
          <loext:transformation loext:type="lumoff" loext:value="0"/>
        </loext:char-complex-color>
      </style:text-properties>
    </style:style>
    <style:style style:name="T16" style:family="text">
      <style:text-properties fo:color="#6803ff" loext:opacity="100%" style:text-position="0% 100%" style:font-name="Supply" style:text-underline-style="none" fo:font-weight="normal" officeooo:rsid="0020c530" style:font-weight-asian="normal" style:font-weight-complex="normal"/>
    </style:style>
    <style:style style:name="T17" style:family="text">
      <style:text-properties fo:color="#ff0000" loext:opacity="100%" style:text-position="0% 100%" style:font-name="Supply" style:text-underline-style="none" fo:font-weight="normal" officeooo:rsid="0020c530" style:font-weight-asian="normal" style:font-weight-complex="normal">
        <loext:char-complex-color loext:theme-type="dark2" loext:color-type="theme">
          <loext:transformation loext:type="lumoff" loext:value="0"/>
        </loext:char-complex-color>
      </style:text-properties>
    </style:style>
    <style:style style:name="T18" style:family="text">
      <style:text-properties style:use-window-font-color="true" loext:opacity="0%" style:text-position="0% 100%" style:font-name="Supply" style:text-underline-style="none" fo:font-weight="normal" officeooo:rsid="0022345d" style:font-weight-asian="normal" style:font-weight-complex="normal"/>
    </style:style>
    <style:style style:name="T19" style:family="text">
      <style:text-properties fo:color="#ff0000" loext:opacity="100%" style:text-position="0% 100%" style:font-name="Supply" style:text-underline-style="none" fo:font-weight="normal" officeooo:rsid="0022345d" style:font-weight-asian="normal" style:font-weight-complex="normal"/>
    </style:style>
    <style:style style:name="T20" style:family="text">
      <style:text-properties fo:color="#6803ff" loext:opacity="100%" style:text-position="0% 100%" style:font-name="Supply" style:text-underline-style="none" fo:font-weight="normal" officeooo:rsid="0022345d" style:font-weight-asian="normal" style:font-weight-complex="normal"/>
    </style:style>
    <style:style style:name="T21" style:family="text">
      <style:text-properties fo:color="#00b2b5" loext:opacity="100%" style:text-position="0% 100%" style:font-name="Supply" style:text-underline-style="none" fo:font-weight="normal" officeooo:rsid="0022345d" style:font-weight-asian="normal" style:font-weight-complex="normal">
        <loext:char-complex-color loext:theme-type="dark2" loext:color-type="theme">
          <loext:transformation loext:type="lumoff" loext:value="0"/>
        </loext:char-complex-color>
      </style:text-properties>
    </style:style>
    <style:style style:name="T22" style:family="text">
      <style:text-properties fo:color="#ff0000" loext:opacity="100%"/>
    </style:style>
    <style:style style:name="T23" style:family="text">
      <style:text-properties fo:color="#6803ff" loext:opacity="100%">
        <loext:char-complex-color loext:theme-type="dark1" loext:color-type="theme">
          <loext:transformation loext:type="lumoff" loext:value="0"/>
        </loext:char-complex-color>
      </style:text-properties>
    </style:style>
    <style:style style:name="T24" style:family="text">
      <style:text-properties fo:color="#6803ff" loext:opacity="100%"/>
    </style:style>
    <style:style style:name="T25" style:family="text">
      <style:text-properties fo:color="#6803ff" loext:opacity="100%" officeooo:rsid="0022758a"/>
    </style:style>
    <style:style style:name="T26" style:family="text">
      <style:text-properties officeooo:rsid="0022758a"/>
    </style:style>
    <style:style style:name="T27" style:family="text">
      <style:text-properties fo:color="#00b2b5" loext:opacity="100%" officeooo:rsid="0022758a">
        <loext:char-complex-color loext:theme-type="dark2" loext:color-type="theme">
          <loext:transformation loext:type="lumoff" loext:value="0"/>
        </loext:char-complex-color>
      </style:text-properties>
    </style:style>
    <style:style style:name="T28" style:family="text">
      <style:text-properties fo:color="#ff0000" loext:opacity="100%">
        <loext:char-complex-color loext:theme-type="light1" loext:color-type="theme">
          <loext:transformation loext:type="lumoff" loext:value="0"/>
        </loext:char-complex-color>
      </style:text-properties>
    </style:style>
    <style:style style:name="T29" style:family="text">
      <style:text-properties fo:color="#00b2b5" loext:opacity="100%"/>
    </style:style>
    <style:style style:name="T30" style:family="text">
      <style:text-properties fo:color="#6803ff" loext:opacity="100%" officeooo:rsid="0027c062"/>
    </style:style>
    <style:style style:name="T31" style:family="text">
      <style:text-properties officeooo:rsid="0027c062"/>
    </style:style>
    <style:style style:name="T32" style:family="text">
      <style:text-properties fo:color="#00b2b5" loext:opacity="100%" officeooo:rsid="0027c062"/>
    </style:style>
    <style:style style:name="T33" style:family="text">
      <style:text-properties fo:color="#6803ff" loext:opacity="100%" officeooo:rsid="0027c062">
        <loext:char-complex-color loext:theme-type="dark1" loext:color-type="theme">
          <loext:transformation loext:type="lumoff" loext:value="0"/>
        </loext:char-complex-color>
      </style:text-properties>
    </style:style>
    <style:style style:name="T34" style:family="text">
      <style:text-properties fo:color="#6803ff" loext:opacity="100%" officeooo:rsid="002960cb"/>
    </style:style>
    <style:style style:name="T35" style:family="text">
      <style:text-properties officeooo:rsid="002960cb"/>
    </style:style>
    <style:style style:name="T36" style:family="text">
      <style:text-properties officeooo:rsid="002a7583"/>
    </style:style>
    <style:style style:name="T37" style:family="text">
      <style:text-properties fo:color="#ff0000" loext:opacity="100%" officeooo:rsid="002a7583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2b54cf"/>
    </style:style>
    <style:style style:name="T40" style:family="text">
      <style:text-properties fo:color="#ff0000" loext:opacity="100%" style:text-underline-style="none" officeooo:rsid="002b54cf"/>
    </style:style>
    <style:style style:name="T41" style:family="text">
      <style:text-properties officeooo:rsid="002c7048"/>
    </style:style>
    <style:style style:name="T42" style:family="text">
      <style:text-properties fo:color="#ff0000" loext:opacity="100%" officeooo:rsid="002c7048"/>
    </style:style>
    <style:style style:name="T43" style:family="text">
      <style:text-properties officeooo:rsid="002f672c"/>
    </style:style>
    <style:style style:name="T44" style:family="text">
      <style:text-properties officeooo:rsid="002fd62d"/>
    </style:style>
    <style:style style:name="T45" style:family="text">
      <style:text-properties fo:color="#00b2b5" loext:opacity="100%">
        <loext:char-complex-color loext:theme-type="dark2" loext:color-type="theme">
          <loext:transformation loext:type="lumoff" loext:value="0"/>
        </loext:char-complex-color>
      </style:text-properties>
    </style:style>
    <style:style style:name="T46" style:family="text">
      <style:text-properties officeooo:rsid="002f981b"/>
    </style:style>
    <style:style style:name="T47" style:family="text">
      <style:text-properties fo:color="#6803ff" loext:opacity="100%" officeooo:rsid="002f981b">
        <loext:char-complex-color loext:theme-type="dark1" loext:color-type="theme">
          <loext:transformation loext:type="lumoff" loext:value="0"/>
        </loext:char-complex-color>
      </style:text-properties>
    </style:style>
    <style:style style:name="T48" style:family="text">
      <style:text-properties fo:color="#6803ff" loext:opacity="100%" officeooo:rsid="002f981b"/>
    </style:style>
    <style:style style:name="T49" style:family="text">
      <style:text-properties fo:color="#ff0000" loext:opacity="100%" officeooo:rsid="002fd62d"/>
    </style:style>
    <style:style style:name="T50" style:family="text">
      <style:text-properties fo:color="#6803ff" loext:opacity="100%" officeooo:rsid="002fd62d"/>
    </style:style>
    <style:style style:name="T51" style:family="text">
      <style:text-properties fo:color="#00b2b5" loext:opacity="100%" officeooo:rsid="002fd62d">
        <loext:char-complex-color loext:theme-type="dark2" loext:color-type="theme">
          <loext:transformation loext:type="lumoff" loext:value="0"/>
        </loext:char-complex-color>
      </style:text-properties>
    </style:style>
    <style:style style:name="T52" style:family="text">
      <style:text-properties fo:color="#00b2b5" loext:opacity="100%" officeooo:rsid="002fd62d"/>
    </style:style>
    <style:style style:name="T53" style:family="text">
      <style:text-properties fo:color="#00b2b5" loext:opacity="100%" officeooo:rsid="002fd62d">
        <loext:char-complex-color loext:theme-type="light1" loext:color-type="theme">
          <loext:transformation loext:type="lumoff" loext:value="0"/>
        </loext:char-complex-color>
      </style:text-properties>
    </style:style>
    <style:style style:name="T54" style:family="text">
      <style:text-properties officeooo:rsid="0032069d"/>
    </style:style>
    <style:style style:name="T55" style:family="text">
      <style:text-properties officeooo:rsid="0030cc94"/>
    </style:style>
    <style:style style:name="T56" style:family="text">
      <style:text-properties fo:color="#6803ff" loext:opacity="100%" officeooo:rsid="0030cc94"/>
    </style:style>
    <style:style style:name="T57" style:family="text">
      <style:text-properties fo:color="#00b2b5" loext:opacity="100%" officeooo:rsid="0030cc94"/>
    </style:style>
    <style:style style:name="T58" style:family="text">
      <style:text-properties fo:color="#00b2b5" loext:opacity="100%" officeooo:rsid="0032069d"/>
    </style:style>
    <style:style style:name="T59" style:family="text">
      <style:text-properties fo:color="#6803ff" loext:opacity="100%" officeooo:rsid="0032069d"/>
    </style:style>
    <style:style style:name="T60" style:family="text">
      <style:text-properties officeooo:rsid="00330250"/>
    </style:style>
    <style:style style:name="T61" style:family="text">
      <style:text-properties fo:color="#ff0000" loext:opacity="100%" officeooo:rsid="00330250">
        <loext:char-complex-color loext:theme-type="light1" loext:color-type="theme">
          <loext:transformation loext:type="lumoff" loext:value="0"/>
        </loext:char-complex-color>
      </style:text-properties>
    </style:style>
    <style:style style:name="T62" style:family="text">
      <style:text-properties fo:color="#00b2b5" loext:opacity="100%">
        <loext:char-complex-color loext:theme-type="dark1" loext:color-type="theme">
          <loext:transformation loext:type="lumoff" loext:value="0"/>
        </loext:char-complex-color>
      </style:text-properties>
    </style:style>
    <style:style style:name="T63" style:family="text">
      <style:text-properties fo:color="#6803ff" loext:opacity="100%">
        <loext:char-complex-color loext:theme-type="dark2" loext:color-type="theme">
          <loext:transformation loext:type="lumoff" loext:value="0"/>
        </loext:char-complex-color>
      </style:text-properties>
    </style:style>
    <style:style style:name="T64" style:family="text">
      <style:text-properties fo:color="#00b2b5" loext:opacity="100%" fo:background-color="transparent" loext:char-shading-value="0">
        <loext:char-complex-color loext:theme-type="light1" loext:color-type="theme">
          <loext:transformation loext:type="lumoff" loext:value="0"/>
        </loext:char-complex-color>
      </style:text-properties>
    </style:style>
    <style:style style:name="T65" style:family="text">
      <style:text-properties fo:color="#551a8b" loext:opacity="100%"/>
    </style:style>
    <style:style style:name="T66" style:family="text">
      <style:text-properties fo:color="#00b2b5" loext:opacity="100%">
        <loext:char-complex-color loext:theme-type="accent1" loext:color-type="theme">
          <loext:transformation loext:type="lumoff" loext:value="0"/>
        </loext:char-complex-color>
      </style:text-properties>
    </style:style>
    <style:style style:name="T67" style:family="text">
      <style:text-properties style:use-window-font-color="true" loext:opacity="0%" style:font-name="Supply" style:text-underline-style="none" fo:font-weight="normal" officeooo:rsid="00347fb4" style:font-weight-asian="normal" style:font-weight-complex="normal"/>
    </style:style>
    <style:style style:name="T68" style:family="text">
      <style:text-properties fo:color="#6803ff" loext:opacity="100%" style:font-name="Supply" style:text-underline-style="none" fo:font-weight="normal" officeooo:rsid="00347fb4" style:font-weight-asian="normal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69" style:family="text">
      <style:text-properties fo:color="#6803ff" loext:opacity="100%" style:font-name="Supply" style:text-underline-style="none" fo:font-weight="normal" officeooo:rsid="00347fb4" style:font-weight-asian="normal" style:font-weight-complex="normal"/>
    </style:style>
    <style:style style:name="T70" style:family="text">
      <style:text-properties fo:color="#00b2b5" loext:opacity="100%" style:font-name="Supply" style:text-underline-style="none" fo:font-weight="normal" officeooo:rsid="00347fb4" fo:background-color="transparent" loext:char-shading-value="0" style:font-weight-asian="normal" style:font-weight-complex="normal">
        <loext:char-complex-color loext:theme-type="accent1" loext:color-type="theme">
          <loext:transformation loext:type="lumoff" loext:value="0"/>
        </loext:char-complex-color>
      </style:text-properties>
    </style:style>
    <style:style style:name="T71" style:family="text">
      <style:text-properties officeooo:rsid="0034f7be"/>
    </style:style>
    <style:style style:name="T72" style:family="text">
      <style:text-properties style:use-window-font-color="true" loext:opacity="0%" style:font-name="Supply" style:text-underline-style="none" fo:font-weight="normal" officeooo:rsid="0033bd4e" style:font-weight-asian="normal" style:font-weight-complex="normal"/>
    </style:style>
    <style:style style:name="T73" style:family="text">
      <style:text-properties style:use-window-font-color="true" loext:opacity="0%" style:font-name="Supply" style:text-underline-style="solid" style:text-underline-width="auto" style:text-underline-color="#ff0000" fo:font-weight="normal" officeooo:rsid="00330250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Drop_20_Cap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in Expressions.</text:p>
      <text:p text:style-name="P1"/>
      <text:list text:style-name="L1">
        <text:list-item>
          <text:p text:style-name="P2"><text:span text:style-name="T1">Natural Join:<text:line-break/><text:line-break/> Opera en </text:span><text:span text:style-name="T2">2 relaciones</text:span><text:span text:style-name="T1"> y produce </text:span><text:span text:style-name="T3">una relación como resultado</text:span><text:span text:style-name="T1">:<text:line-break/><text:line-break/><text:tab/>student </text:span><text:span text:style-name="T4">NATURAL JOIN</text:span><text:span text:style-name="T1"> takes<text:line-break/><text:line-break/>Se considera </text:span><text:span text:style-name="T3">solamente los pares de tuplas</text:span><text:span text:style-name="T1"> donde tanto la tupla de student y la de takes tengan los </text:span><text:span text:style-name="T3">mismos valores en el atributo en común (ID)</text:span><text:span text:style-name="T1">.<text:line-break/></text:span><text:span text:style-name="T5">El orden importa.</text:span><text:span text:style-name="T6"><text:line-break/><text:line-break/>En general:<text:line-break/><text:line-break/><text:tab/></text:span><text:span text:style-name="T7">SELECT</text:span><text:span text:style-name="T6"> A</text:span><text:span text:style-name="T8">1</text:span><text:span text:style-name="T9">, A</text:span><text:span text:style-name="T8">2</text:span><text:span text:style-name="T9">, … , A</text:span><text:span text:style-name="T8">n</text:span><text:span text:style-name="T9"> <text:line-break/><text:tab/></text:span><text:span text:style-name="T10">FROM</text:span><text:span text:style-name="T9"> r</text:span><text:span text:style-name="T8">1 </text:span><text:span text:style-name="T11">NATURAL JOIN</text:span><text:span text:style-name="T9"> r</text:span><text:span text:style-name="T8">2 </text:span><text:span text:style-name="T12">NATURAL JOIN</text:span><text:span text:style-name="T13"> … </text:span><text:span text:style-name="T12">NATURAL JOIN</text:span><text:span text:style-name="T13"> r</text:span><text:span text:style-name="T14">n<text:line-break/><text:tab/></text:span><text:span text:style-name="T15">WHERE</text:span><text:span text:style-name="T13"> P;<text:line-break/><text:line-break/>De forma aún más general la cláusula FROM puede tener la forma: <text:line-break/><text:line-break/><text:tab/> </text:span><text:span text:style-name="T16">FROM</text:span><text:span text:style-name="T13"> E</text:span><text:span text:style-name="T14">1</text:span><text:span text:style-name="T13">, E</text:span><text:span text:style-name="T14">2</text:span><text:span text:style-name="T13">, … , E</text:span><text:span text:style-name="T14">n</text:span><text:span text:style-name="T13"> <text:line-break/><text:line-break/>Dónde cada E puede ser </text:span><text:span text:style-name="T17">una relación o una expresión conteniendo natural joins</text:span><text:span text:style-name="T13">. Como por ejemplo: <text:line-break/><text:line-break/> <text:tab/></text:span><text:span text:style-name="T16">SELECT</text:span><text:span text:style-name="T13"> name, title <text:line-break/> <text:tab/></text:span><text:span text:style-name="T16">FROM</text:span><text:span text:style-name="T13"> studant </text:span><text:span text:style-name="T16">NATURAL JOIN</text:span><text:span text:style-name="T13"> takes, course<text:line-break/> <text:tab/></text:span><text:span text:style-name="T16">WHERE</text:span><text:span text:style-name="T13"> takes.course_id = course.course_id;<text:line-break/><text:line-break/></text:span><text:span text:style-name="T18">También hay una forma de especificar </text:span><text:span text:style-name="T19">exactamente que que columnas deben ser igualadas</text:span><text:span text:style-name="T18">:<text:line-break/><text:line-break/><text:tab/></text:span><text:span text:style-name="T20">SELECT</text:span><text:span text:style-name="T18"> name, title<text:line-break/><text:tab/></text:span><text:span text:style-name="T20">FROM</text:span><text:span text:style-name="T18"> (student </text:span><text:span text:style-name="T20">NATURAL JOIN</text:span><text:span text:style-name="T18"> takes) </text:span><text:span text:style-name="T20">JOIN</text:span><text:span text:style-name="T18"> course </text:span><text:span text:style-name="T21">USING</text:span><text:span text:style-name="T18"> <text:tab/>(course-<text:tab/>id);<text:line-break/></text:span></text:p>
        </text:list-item>
      </text:list>
      <text:list text:style-name="L2">
        <text:list-item>
          <text:p text:style-name="P3">Join Conditions: <text:line-break/><text:line-break/> La condición ON nos permite usar un p<text:span text:style-name="T22">redicado general sobre las relaciones que se van a juntar</text:span>. Se parece a la cláusula WHERE:<text:line-break/><text:line-break/><text:tab/><text:span text:style-name="T23">SELECT</text:span> * <text:line-break/><text:tab/><text:span text:style-name="T24">FRO</text:span><text:span text:style-name="T25">M</text:span><text:span text:style-name="T26"> student </text:span><text:span text:style-name="T25">JOIN</text:span><text:span text:style-name="T26"> takes </text:span><text:span text:style-name="T27">ON</text:span><text:span text:style-name="T26"> student.ID = takes.I<text:line-break/></text:span></text:p>
        </text:list-item>
        <text:list-item>
          <text:p text:style-name="P4"><text:soft-page-break/>Outer Joins: <text:line-break/><text:line-break/> Funciona de manera similar a la natural join que ya vimos pero <text:span text:style-name="T22">preserva las tuplas que se perderían</text:span> en un join creando <text:span text:style-name="T28">tuplas con valores null</text:span>. Hay varios tipos: <text:line-break/></text:p>
          <text:list>
            <text:list-item>
              <text:p text:style-name="P5">Left Outer Join:<text:line-break/><text:line-break/> Preserva las tuplas en la relación que se mencionó <text:span text:style-name="T22">a la izquierda</text:span> de la expresión LEFT OUTER JOIN.<text:line-break/></text:p>
            </text:list-item>
            <text:list-item>
              <text:p text:style-name="P5">Right Outer Join:<text:line-break/><text:line-break/> Preserva las tuplas en la relación que se mencionó <text:span text:style-name="T22">a la derecha</text:span> de la expresión RIGHT OUTER JOIN.<text:line-break/></text:p>
            </text:list-item>
            <text:list-item>
              <text:p text:style-name="P5">Full Outer Join:<text:line-break/><text:line-break/> Preserva las tuplas en <text:span text:style-name="T22">ambas relaciones</text:span>.<text:line-break/></text:p>
            </text:list-item>
          </text:list>
        </text:list-item>
      </text:list>
      <text:p text:style-name="P6">Views</text:p>
      <text:p text:style-name="P7"/>
      <text:p text:style-name="P7">Ya sea por cuestiones de seguridad o por comodidad podemos no querer que se muestren todas los atributos de una relación dada una consulta.</text:p>
      <text:p text:style-name="P7">Para esto se usan <text:span text:style-name="T22">relaciones virtuales</text:span> <text:span text:style-name="T22">definidas por una query</text:span> y la relación que conceptualmente tiene el resultado de la query.</text:p>
      <text:p text:style-name="P7"/>
      <text:list text:style-name="L3">
        <text:list-item>
          <text:p text:style-name="P8">View Definition:<text:line-break/><text:line-break/><text:tab/> <text:span text:style-name="T29">CREATE VIEW</text:span> v <text:span text:style-name="T24">AS</text:span> &lt;query expression&gt;;<text:line-break/></text:p>
          <text:p text:style-name="P8">“query expression” es cualquier consulta que sea legal. Por ejemplo: <text:line-break/><text:line-break/><text:tab/><text:span text:style-name="T24">CREATE VIEW</text:span> physics_fall_2017 <text:span text:style-name="T24">AS</text:span><text:line-break/><text:tab/> <text:span text:style-name="T24">SELECT</text:span> course.course_id, sec_id, building, room_number<text:line-break/><text:tab/> <text:span text:style-name="T24">FROM</text:span> course, section<text:line-break/><text:tab/> <text:span text:style-name="T24">WHERE</text:span> course.course_id = section.course_id<text:line-break/><text:tab/><text:tab/> <text:span text:style-name="T24">AND</text:span> course.dept_name = “Physics”<text:line-break/> <text:tab/> <text:s text:c="3"/><text:tab/> <text:span text:style-name="T24">AND</text:span> section.semester = “Fall”<text:line-break/><text:tab/><text:tab/> <text:span text:style-name="T24">AND</text:span> section.year = 2017;<text:line-break/></text:p>
        </text:list-item>
        <text:list-item>
          <text:p text:style-name="P8">Using Views in SQL Queries:<text:line-break/> <text:line-break/> Las vistas pueden aparecer en <text:span text:style-name="T22">cualquier lugar donde una relación podría estar</text:span>:<text:line-break/><text:soft-page-break/><text:line-break/> <text:tab/><text:span text:style-name="T30">SELECT</text:span><text:span text:style-name="T31"> course_id<text:line-break/><text:tab/></text:span><text:span text:style-name="T30">FROM</text:span><text:span text:style-name="T31"> </text:span><text:span text:style-name="T32">physics_fall_2017</text:span><text:span text:style-name="T31"><text:line-break/><text:tab/></text:span><text:span text:style-name="T33">WHERE</text:span><text:span text:style-name="T31"> building = ‘Watson’;<text:line-break/><text:line-break/> Se pueden especificar explícitamente el nombre de los atributos de una vista de la siguiente manera: <text:line-break/><text:line-break/><text:tab/></text:span><text:span text:style-name="T34">CREATE VIEW</text:span><text:span text:style-name="T35"> departments_total_salary (dept_name, <text:tab/>total_salary) </text:span><text:span text:style-name="T34">AS</text:span><text:span text:style-name="T35"><text:line-break/><text:tab/></text:span><text:span text:style-name="T34">SELECT</text:span><text:span text:style-name="T35"> dept_name, </text:span><text:span text:style-name="T34">SUM</text:span><text:span text:style-name="T35"> (salary)<text:line-break/><text:tab/></text:span><text:span text:style-name="T34">FROM</text:span><text:span text:style-name="T35"> instructor<text:line-break/><text:tab/></text:span><text:span text:style-name="T34">GROUP BY</text:span><text:span text:style-name="T35"> dept_name;<text:line-break/><text:line-break/> Se pueden usar una view en la definición de otra view.<text:line-break/></text:span></text:p>
        </text:list-item>
        <text:list-item>
          <text:p text:style-name="P9">Materialized Views:<text:line-break/><text:line-break/> En algunos sistemas <text:span text:style-name="T22">se pueden persistir las vistas</text:span>, pero asegurándonos que <text:span text:style-name="T22">se actualicen si hay modificaciones</text:span>.<text:line-break/> Este proceso se denomina materialized view maintenance. El período de actualización depende del sistema y/o del programador. Son <text:span text:style-name="T22">más rápidas</text:span> que las queries normales, pero hay que <text:span text:style-name="T22">tener en cuenta el costo de actualización y de almacenamiento</text:span>. No hay convención al respecto.<text:line-break/></text:p>
        </text:list-item>
        <text:list-item>
          <text:p text:style-name="P9">Update of a View: <text:line-break/><text:line-break/> <text:span text:style-name="T36">Se pueden presentar </text:span><text:span text:style-name="T37">inconvenientes al hacer inserciones o modificaciones en las tablas mediante vistas</text:span><text:span text:style-name="T36"> (campos incompletos o mal posicionados) por lo que las modificaciones, generalmente, no están permitidas en relaciones de vistas, salvo contadas excepciones.<text:line-break/> En general, se dice que una vista es “updatable” si se cumplen las siguientes condiciones: <text:line-break/></text:span></text:p>
        </text:list-item>
      </text:list>
      <text:list text:style-name="L4">
        <text:list-item>
          <text:list>
            <text:list-item>
              <text:p text:style-name="P10">La cláusula <text:span text:style-name="T22">FROM</text:span> solo tiene <text:span text:style-name="T22">una database en la relación</text:span><text:line-break/></text:p>
            </text:list-item>
            <text:list-item>
              <text:p text:style-name="P10">La cláusula <text:span text:style-name="T22">SELECT</text:span> <text:span text:style-name="T22">solo contiene nombres de los atributos de la relación y no expresiones, agregaciones o especificaciones distintivas</text:span> (DISTINCT)<text:line-break/></text:p>
            </text:list-item>
            <text:list-item>
              <text:p text:style-name="P10">Cualquier atributo no listado en la cláusula <text:span text:style-name="T22">SELECT</text:span> <text:span text:style-name="T22">puede ser seteado a null</text:span> (no tiene una restricción de tipo NOT NULL)<text:line-break/></text:p>
            </text:list-item>
            <text:list-item>
              <text:p text:style-name="P10">La query no tiene una cláusula <text:span text:style-name="T22">GROUP BY o HAVING.</text:span></text:p>
            </text:list-item>
          </text:list>
        </text:list-item>
      </text:list>
      <text:p text:style-name="P11"><text:soft-page-break/>Transactions<text:line-break/><text:line-break/><text:span text:style-name="T38"> </text:span><text:span text:style-name="T39">Consiste en una </text:span><text:span text:style-name="T40">secuencia de queries y/o sentencias de actualización</text:span><text:span text:style-name="T39">. Una transacción </text:span><text:span text:style-name="T40">comienza implícitamente cuando una sentencia SQL es ejecutada</text:span><text:span text:style-name="T39">. Para finalizar una transacción:</text:span></text:p>
      <text:p text:style-name="P12"/>
      <text:list text:style-name="L5">
        <text:list-item>
          <text:p text:style-name="P13">Commit work: Hace que las actualizaciones se hagan <text:span text:style-name="T22">permanentes</text:span> en la base de datos.<text:line-break/></text:p>
        </text:list-item>
        <text:list-item>
          <text:p text:style-name="P13">Rollback work: <text:span text:style-name="T22">Deshace todas las modificaciones realizadas durante la transacción</text:span>. La base de datos se restaura al estado previo a que se ejecute la transacción.<text:line-break/></text:p>
        </text:list-item>
      </text:list>
      <text:p text:style-name="P14"><text:s/>Las transacciones son <text:span text:style-name="T22">atómicas</text:span>, es decir a <text:span text:style-name="T22">todo o nada</text:span>. O todos los efectos de la transacción se reflejan en la base de datos o ninguno.<text:line-break/> <text:span text:style-name="T41">Hay varias formas de declarar el inicio de una transacción (depende el sistema). Normalmente, </text:span><text:span text:style-name="T42">una sentencia individual se considera una transacción en sí misma y se “commitea” automáticamente</text:span><text:span text:style-name="T41">. Esta opción </text:span><text:span text:style-name="T42">se puede desactivar</text:span><text:span text:style-name="T41">, lo cual nos lleva a las palabras clave para iniciar una transacción y para finalizarla:</text:span></text:p>
      <text:p text:style-name="P14"/>
      <text:list text:style-name="L6">
        <text:list-item>
          <text:p text:style-name="P15">BEGIN ATOMIC … END: Parte del standard de SQL de 1999<text:line-break/></text:p>
        </text:list-item>
        <text:list-item>
          <text:p text:style-name="P15">BEGIN … COMMIT WORK / ROLLBACK WORK: Usado por MySQL o PostgreSQL.<text:line-break/></text:p>
        </text:list-item>
      </text:list>
      <text:p text:style-name="P16">Integrity Constraints</text:p>
      <text:p text:style-name="P17"><text:line-break/> Aseguran la <text:span text:style-name="T22">consistencia de datos ante las modificaciones realizadas por usuarios autorizados</text:span>. No restringe el acceso a usuarios no autorizados. Ejemplos de restricciones de integridad son: </text:p>
      <text:list text:style-name="L7">
        <text:list-header>
          <text:p text:style-name="P18"/>
        </text:list-header>
        <text:list-item>
          <text:p text:style-name="P18">El nombre de un instructor no puede ser null<text:line-break/></text:p>
        </text:list-item>
        <text:list-item>
          <text:p text:style-name="P18">Dos instructores no pueden tener el mismo ID<text:line-break/></text:p>
        </text:list-item>
        <text:list-item>
          <text:p text:style-name="P18">Cada name de department en la relación course debe tener un department name coincidente en la relación department<text:line-break/></text:p>
        </text:list-item>
        <text:list-item>
          <text:p text:style-name="P18">El presupuesto para un department debe ser mayor a $0.00 <text:s/></text:p>
        </text:list-item>
      </text:list>
      <text:p text:style-name="P17"/>
      <text:list text:style-name="L8">
        <text:list-item>
          <text:p text:style-name="P19">Constrains on a Single Relation:<text:line-break/><text:line-break/> <text:span text:style-name="T43">Vimos muchos de estos en la unidad anterior, por lo que </text:span><text:soft-page-break/><text:span text:style-name="T43">solamente detallaremos los más relevantes: <text:line-break/></text:span></text:p>
          <text:list>
            <text:list-item>
              <text:p text:style-name="P20">The Check Clause:<text:line-break/><text:line-break/> Especifica un predicado que <text:span text:style-name="T22">debe ser satisfecho por cada tupla en la relación</text:span>. Se usa para que los valores de ciertos atributos cumplan con <text:span text:style-name="T22">condiciones específicas</text:span>, formando un fuerte sistema de tipos. Por ejemplo <text:span text:style-name="T44">(se simula un ENUM)</text:span>:<text:line-break/><text:line-break/><text:tab/><text:span text:style-name="T24">CREATE TABLE</text:span> section<text:line-break/><text:tab/> (course_id <text:s text:c="7"/><text:span text:style-name="T24">VARCHAR</text:span> (8),<text:line-break/><text:tab/> sec_id <text:s text:c="11"/><text:span text:style-name="T24">VARCHAR</text:span> (8),<text:line-break/><text:tab/> semester <text:s text:c="9"/><text:span text:style-name="T24">VARCHAR</text:span> (6),<text:line-break/><text:tab/> year <text:s text:c="13"/><text:span text:style-name="T24">NUMERIC</text:span> (4,0),<text:line-break/><text:tab/> building <text:s text:c="9"/><text:span text:style-name="T24">VARCHAR</text:span> (15),<text:line-break/><text:tab/> room_number <text:s text:c="6"/><text:span text:style-name="T24">VARCHAR</text:span>(7),<text:line-break/><text:tab/> time_slot_id <text:s text:c="5"/><text:span text:style-name="T24">VARCHAR</text:span>(4),<text:line-break/><text:tab/> <text:span text:style-name="T24">PRIMARY KEY</text:span> (course_id, sec_id, semester, year),<text:line-break/><text:tab/> <text:span text:style-name="T45">CHECK</text:span> (semester <text:span text:style-name="T24">IN</text:span> <text:tab/><text:tab/>(‘Fall’,‘Winter’,’Spring’,‘Summer’)));<text:line-break/></text:p>
            </text:list-item>
          </text:list>
        </text:list-item>
        <text:list-item>
          <text:p text:style-name="P21">Referetial Integrity:<text:line-break/></text:p>
          <text:p text:style-name="P22"><text:s/><text:span text:style-name="T46">Muchas veces queremos asegurarnos que los valores para un conjunto de atributos dados de una relación también aparezcan en otra relación. Para esto usamos las foreign keys:<text:line-break/><text:line-break/><text:tab/></text:span><text:span text:style-name="T47">FOREIGN KEY</text:span><text:span text:style-name="T46"> (dept_name) </text:span><text:span text:style-name="T48">REFERENCES</text:span><text:span text:style-name="T46"> department;<text:line-break/><text:line-break/> </text:span><text:span text:style-name="T44">Cuando una restricción de integridad referencial es violada, el </text:span><text:span text:style-name="T49">procedimiento normal es rechazar la transacción</text:span><text:span text:style-name="T44">. Sin embargo, </text:span><text:span text:style-name="T49">una cláusula FOREIGN KEY puede especificar que si una acción de eliminación o modificación viola la restricción, en lugar de rechazar la acción, el sistema tome medidas para cambiar la tupla en la relación referenciada para restaurar la restricción</text:span><text:span text:style-name="T44">. Por ejemplo: <text:line-break/><text:line-break/><text:tab/></text:span><text:span text:style-name="T50">CREATE TABLE</text:span><text:span text:style-name="T44"> course <text:line-break/><text:tab/> (…<text:line-break/><text:tab/> </text:span><text:span text:style-name="T50">FOREIGN KEY</text:span><text:span text:style-name="T44"> (dept_name) </text:span><text:span text:style-name="T51">REFERENCES</text:span><text:span text:style-name="T44"> department <text:line-break/><text:tab/> </text:span><text:span text:style-name="T52">ON DELETE CASCADE</text:span><text:span text:style-name="T44"><text:line-break/><text:tab/> </text:span><text:span text:style-name="T52">ON UPDATE CASCADE</text:span><text:span text:style-name="T44">,</text:span><text:line-break/><text:tab/> …<text:span text:style-name="T44">);<text:line-break/><text:line-break/></text:span><text:span text:style-name="T49"> Si la restricción es violada el campo referenciado (dept_name) puede ser seteado a null (usando </text:span><text:span text:style-name="T52">SET NULL</text:span><text:span text:style-name="T49"> en </text:span><text:soft-page-break/><text:span text:style-name="T49">lugar de </text:span><text:span text:style-name="T53">CASCADE</text:span><text:span text:style-name="T49">), o al valor por defecto del dominio (usando </text:span><text:span text:style-name="T52">SET DEFAULT</text:span><text:span text:style-name="T49">) <text:line-break/></text:span></text:p>
        </text:list-item>
        <text:list-item>
          <text:p text:style-name="P23">Assigning Names to Constrain<text:span text:style-name="T54">t</text:span>s:<text:line-break/><text:line-break/> <text:span text:style-name="T55">Para asignar un nombre a una restricción (útil si después se quieren borrar): <text:line-break/><text:line-break/><text:tab/>salary </text:span><text:span text:style-name="T56">NUMERIC</text:span><text:span text:style-name="T55"> (8,2) </text:span><text:span text:style-name="T57">CONSTRAIN</text:span><text:span text:style-name="T58">T</text:span><text:span text:style-name="T55"> minsalary </text:span><text:span text:style-name="T56">CHECK</text:span><text:span text:style-name="T55"> (salary &gt; <text:tab/> 29000), <text:line-break/><text:line-break/>Si luego decidimos que no queremos utilizar más esta restricción:<text:line-break/><text:line-break/><text:tab/></text:span><text:span text:style-name="T59">ALTER TABLE</text:span><text:span text:style-name="T54"> instructor </text:span><text:span text:style-name="T58">DROP CONSTRAINT</text:span><text:span text:style-name="T54"> minsalary;<text:line-break/></text:span></text:p>
        </text:list-item>
        <text:list-item>
          <text:p text:style-name="P24">Integrity Constraint Violation During a Transaction:<text:line-break/><text:line-break/> Una restricción admite las cláusulas:<text:line-break/></text:p>
          <text:list>
            <text:list-item>
              <text:p text:style-name="P24">INITIALLY DEFERRED: La restricción se checkea al <text:span text:style-name="T22">final de la transacción</text:span>.<text:line-break/></text:p>
            </text:list-item>
            <text:list-item>
              <text:p text:style-name="P24">DEFERRABLE: Se checkea <text:span text:style-name="T22">inmediatamente por default</text:span> pero se puede checkear <text:span text:style-name="T22">cuando sea deseado</text:span> (<text:span text:style-name="T45">SET CONSTRAINTS</text:span> constraint-list <text:span text:style-name="T29">DEFERRED</text:span>). Las restricciones en la lista deben estar nombradas.<text:line-break/></text:p>
            </text:list-item>
          </text:list>
        </text:list-item>
        <text:list-item>
          <text:p text:style-name="P24">Complex Check Conditions and Assertions: <text:line-break/><text:line-break/> <text:span text:style-name="T60">Tener cláusulas CHECK complejas (con subconsultas) o crear aserciones (CREATE ASSERTION), que análogas a reglas absolutas es, normalmente, muy caro a nivel de recursos y </text:span><text:span text:style-name="T61">casi no se utiliza al día de hoy</text:span><text:span text:style-name="T60">. Por lo tanto no se hablará en detalle de este tema. Si vale aclarar que una “solución” a este problema son los Triggers (que los veremos más adelante).<text:line-break/></text:span></text:p>
        </text:list-item>
      </text:list>
      <text:p text:style-name="P25">SQL Data Types and Schemas</text:p>
      <text:p text:style-name="P25"/>
      <text:list text:style-name="L9">
        <text:list-item>
          <text:p text:style-name="P26">Date and Time Types in SQL: <text:line-break/></text:p>
          <text:list>
            <text:list-item>
              <text:p text:style-name="P26">DATE: Fecha de calendario que contiene un año de 4 dígitos, mes y día del mes<text:line-break/></text:p>
            </text:list-item>
            <text:list-item>
              <text:p text:style-name="P26">TIME: La hora del día en horas, minutos y segundos <text:s/>(se puede usar TIME WITH TIMEZONE)</text:p>
            </text:list-item>
            <text:list-item>
              <text:p text:style-name="P26"><text:soft-page-break/>TIMESTAMP: Una combinación de TIME y de DATE<text:line-break/><text:line-break/> Estos valores se especifican de la siguiente manera: </text:p>
            </text:list-item>
          </text:list>
          <text:p text:style-name="P26"><text:line-break/><text:tab/><text:span text:style-name="T62">DATE</text:span> ‘2018-04-25’<text:line-break/><text:tab/><text:span text:style-name="T29">TIME</text:span> ‘09:30:00’<text:line-break/><text:tab/><text:span text:style-name="T29">TIMESTAMP</text:span> ‘2018-04-25 10:29:01.45’<text:line-break/></text:p>
        </text:list-item>
        <text:list-item>
          <text:p text:style-name="P27">Type Covesion and Formatting Functions: <text:line-break/><text:line-break/> Aunque los sistemas realizan algunas conversiones de tipo de forma automática, otras pueden requerir intervención manual. Para estos casos podemos usar la expresión CAST (e AS t). Por ejemplo: <text:line-break/> <text:line-break/><text:span text:style-name="T63">SELECT</text:span> <text:span text:style-name="T64">CAST</text:span> (ID <text:span text:style-name="T24">AS NUMERIC</text:span> (5))<text:span text:style-name="T65"> </text:span><text:span text:style-name="T24">AS</text:span> inst_id<text:line-break/><text:span text:style-name="T24">FROM</text:span> instructor<text:line-break/><text:span text:style-name="T24">ORDER BY</text:span> inst_id</text:p>
          <text:p text:style-name="P27"><text:line-break/> La implantación puede depender del servicio que se esté usando (PostgresSQL, MySQL, Oracle, etc.)<text:line-break/> Otro inconveniente a la hora de mostrar los resultados es el manejo de los valores nulos. Podemos <text:span text:style-name="T22">elegir como se muestran los valores nulos</text:span> con la función <text:span text:style-name="T22">COALESCE</text:span>. Toma una cantidad arbitraria de <text:span text:style-name="T22">argumentos del mismo tipo</text:span> y retorna el <text:span text:style-name="T22">primer valor no nulo</text:span>. Por ejemplo: <text:line-break/><text:line-break/><text:span text:style-name="T24">SELECT</text:span> ID, <text:span text:style-name="T66">COALESCE</text:span> (salary,0) <text:span text:style-name="T24">AS</text:span> salary<text:line-break/><text:span text:style-name="T24">FROM</text:span> instructor<text:line-break/></text:p>
        </text:list-item>
        <text:list-item>
          <text:p text:style-name="P28"><text:span text:style-name="T67">Default Values<text:line-break/><text:line-break/> SQL permite que se para un atributo en específico se configuren valores por defecto: <text:line-break/><text:line-break/><text:tab/></text:span><text:span text:style-name="T68">CREATE TABLE</text:span><text:span text:style-name="T67"> student <text:line-break/> <text:tab/>(ID <text:s text:c="10"/></text:span><text:span text:style-name="T69">VARCHAR</text:span><text:span text:style-name="T67"> (5),<text:line-break/><text:tab/> name <text:s text:c="8"/></text:span><text:span text:style-name="T69">VARCHAR</text:span><text:span text:style-name="T67"> (20) </text:span><text:span text:style-name="T69">NOT NULL</text:span><text:span text:style-name="T67">,<text:line-break/><text:tab/> dept_name <text:s text:c="3"/></text:span><text:span text:style-name="T69">VARCHAR</text:span><text:span text:style-name="T67"> (20),<text:line-break/><text:tab/> tot_cred <text:s text:c="4"/></text:span><text:span text:style-name="T69">NUMERIC</text:span><text:span text:style-name="T67"> (3,0) </text:span><text:span text:style-name="T70">DEFAULT</text:span><text:span text:style-name="T67"> 0,<text:line-break/><text:tab/> </text:span><text:span text:style-name="T69">PRIMARY KEY</text:span><text:span text:style-name="T67"> (ID));<text:line-break/></text:span></text:p>
        </text:list-item>
        <text:list-item>
          <text:p text:style-name="P29">Large-Object Types:<text:line-break/><text:line-break/> Hay varios tipos: <text:line-break/></text:p>
          <text:list>
            <text:list-item>
              <text:p text:style-name="P30"><text:soft-page-break/><text:span text:style-name="T71">Large-object data types para caracteres (CLOB)<text:line-break/></text:span></text:p>
            </text:list-item>
            <text:list-item>
              <text:p text:style-name="P30"><text:span text:style-name="T71">Large-object data types para información binaria (BLOB)<text:line-break/></text:span></text:p>
              <text:p text:style-name="P29">book_review <text:span text:style-name="T29">CLOB</text:span> (10KB)<text:line-break/>image <text:span text:style-name="T29">BLOB</text:span> (10MB)<text:line-break/>movie <text:span text:style-name="T29">BLOB</text:span> (2GB)<text:line-break/></text:p>
            </text:list-item>
          </text:list>
        </text:list-item>
        <text:list-item>
          <text:p text:style-name="P29"/>
          <text:p text:style-name="P31"><text:span text:style-name="T72"><text:line-break/><text:line-break/></text:span><text:span text:style-name="T73"><text:line-break/><text:line-break/><text:line-break/></text:span></text:p>
        </text:list-item>
      </text:list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upply" svg:font-family="Supply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>
      <style:text-properties fo:color="#ff0000" loext:opacity="100%"/>
    </style:style>
    <style:style style:name="Bullet_20_Symbols" style:display-name="Bullet Symbols" style:family="text">
      <style:text-properties fo:color="#ff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>
        <loext:char-complex-color loext:theme-type="light1" loext:color-type="theme">
          <loext:transformation loext:type="lumoff" loext:value="0"/>
        </loext:char-complex-color>
      </style:text-properties>
    </style:style>
    <style:style style:name="Drop_20_Caps" style:display-name="Drop Caps" style:family="text">
      <style:text-properties fo:color="#ff0000" loext:opacity="100%">
        <loext:char-complex-color loext:theme-type="light1" loext:color-type="theme">
          <loext:transformation loext:type="lumoff" loext:value="0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use-window-font-color="true" loext:opacity="0%" style:font-name="Supply" style:text-underline-style="solid" style:text-underline-width="auto" style:text-underline-color="#ff0000" officeooo:rsid="001ffb5b" officeooo:paragraph-rsid="001ffb5b"/>
    </style:style>
    <style:style style:name="MP2" style:family="paragraph" style:parent-style-name="Header">
      <style:text-properties style:font-name="Supply" officeooo:rsid="001ffb5b" officeooo:paragraph-rsid="001ffb5b"/>
    </style:style>
    <style:style style:name="MT1" style:family="text">
      <style:text-properties style:text-underline-style="solid" style:text-underline-width="auto" style:text-underline-color="#ff00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mbrosini <text:tab/>Teoría de Base de Datos<text:tab/><text:page-number text:select-page="current">9</text:page-number></text:p>
        <text:p text:style-name="MP2"><text:tab/><text:span text:style-name="MT1">Intermediate SQL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8T23:32:49.103809781</meta:creation-date>
    <dc:date>2026-05-19T19:29:09.756071216</dc:date>
    <meta:editing-duration>PT32M49S</meta:editing-duration>
    <meta:editing-cycles>2</meta:editing-cycles>
    <meta:generator>LibreOffice/26.2.3.2$Linux_X86_64 LibreOffice_project/620$Build-2</meta:generator>
    <meta:document-statistic meta:table-count="0" meta:image-count="0" meta:object-count="0" meta:page-count="9" meta:paragraph-count="57" meta:word-count="1516" meta:character-count="9833" meta:non-whitespace-character-count="8071"/>
  </office:meta>
</office:document-meta>
</file>