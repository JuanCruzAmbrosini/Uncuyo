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upply" svg:font-family="Supply" style:font-pitch="variable"/>
    <style:font-face style:name="Supply1" svg:font-family="Supply" style:font-family-generic="roman" style:font-pitch="variable"/>
  </office:font-face-decls>
  <office:automatic-styles>
    <style:style style:name="Paradigmas" style:family="table">
      <style:table-properties style:width="6.691in" fo:margin-top="0.0597in" fo:margin-bottom="0.0597in" table:align="center" style:may-break-between-rows="true" table:border-model="collapsing"/>
    </style:style>
    <style:style style:name="Paradigmas.A" style:family="table-column">
      <style:table-column-properties style:column-width="1.25in"/>
    </style:style>
    <style:style style:name="Paradigmas.B" style:family="table-column">
      <style:table-column-properties style:column-width="3.9424in"/>
    </style:style>
    <style:style style:name="Paradigmas.C" style:family="table-column">
      <style:table-column-properties style:column-width="1.4986in"/>
    </style:style>
    <style:style style:name="Paradigmas.A1" style:family="table-cell">
      <style:table-cell-properties fo:background-color="#bbe6fe" fo:padding="0.0597in" fo:border="none" style:writing-mode="page">
        <style:background-image/>
      </style:table-cell-properties>
    </style:style>
    <style:style style:name="Paradigmas.2" style:family="table-row">
      <style:table-row-properties fo:keep-together="auto"/>
    </style:style>
    <style:style style:name="Paradigmas.A2" style:family="table-cell">
      <style:table-cell-properties style:vertical-align="middle" fo:background-color="transparent" fo:padding="0.0597in" fo:border="none" style:writing-mode="page">
        <style:background-image/>
      </style:table-cell-properties>
    </style:style>
    <style:style style:name="Paradigmas.B2" style:family="table-cell">
      <style:table-cell-properties fo:background-color="transparent" fo:padding="0.0597in" fo:border="none" style:writing-mode="page">
        <style:background-image/>
      </style:table-cell-properties>
    </style:style>
    <style:style style:name="Paradigmas.B3" style:family="table-cell">
      <style:table-cell-properties fo:background-color="transparent" fo:padding="0.0597in" fo:border="none" style:writing-mode="page">
        <style:background-image/>
      </style:table-cell-properties>
    </style:style>
    <style:style style:name="Paradigmas.B4" style:family="table-cell">
      <style:table-cell-properties fo:background-color="transparent" fo:padding="0.0597in" fo:border="none" style:writing-mode="page">
        <style:background-image/>
      </style:table-cell-properties>
    </style:style>
    <style:style style:name="Paradigmas.B5" style:family="table-cell">
      <style:table-cell-properties fo:background-color="transparent" fo:padding="0.0597in" fo:border="none" style:writing-mode="page">
        <style:background-image/>
      </style:table-cell-properties>
    </style:style>
    <style:style style:name="Table1" style:family="table">
      <style:table-properties style:width="6.6951in" table:align="margins"/>
    </style:style>
    <style:style style:name="Table1.A" style:family="table-column">
      <style:table-column-properties style:column-width="1.0146in" style:rel-column-width="9931*"/>
    </style:style>
    <style:style style:name="Table1.B" style:family="table-column">
      <style:table-column-properties style:column-width="1.3118in" style:rel-column-width="12840*"/>
    </style:style>
    <style:style style:name="Table1.C" style:family="table-column">
      <style:table-column-properties style:column-width="1.6931in" style:rel-column-width="16572*"/>
    </style:style>
    <style:style style:name="Table1.D" style:family="table-column">
      <style:table-column-properties style:column-width="1.3104in" style:rel-column-width="12826*"/>
    </style:style>
    <style:style style:name="Table1.E" style:family="table-column">
      <style:table-column-properties style:column-width="1.3653in" style:rel-column-width="13366*"/>
    </style:style>
    <style:style style:name="Table1.A1" style:family="table-cell">
      <style:table-cell-properties fo:padding="0.0799in" fo:border="none" style:writing-mode="page"/>
    </style:style>
    <style:style style:name="P1" style:family="paragraph" style:parent-style-name="Standard">
      <style:paragraph-properties fo:text-align="center" style:justify-single-word="false"/>
      <style:text-properties officeooo:paragraph-rsid="0003f226"/>
    </style:style>
    <style:style style:name="P2" style:family="paragraph" style:parent-style-name="Standard">
      <style:paragraph-properties fo:text-align="center" style:justify-single-word="false"/>
      <style:text-properties style:font-name="Supply1" fo:font-size="12pt" fo:language="es" fo:country="AR" officeooo:paragraph-rsid="0003f226" style:font-size-asian="12pt" style:font-size-complex="12pt"/>
    </style:style>
    <style:style style:name="P3" style:family="paragraph" style:parent-style-name="Standard">
      <style:text-properties style:font-name="Supply1" fo:font-size="11pt" fo:language="es" fo:country="AR" style:text-underline-style="none" officeooo:paragraph-rsid="0003f226" style:font-size-asian="11pt" style:font-size-complex="11pt"/>
    </style:style>
    <style:style style:name="P4"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Supply1" fo:font-size="11pt" fo:language="es" fo:country="AR" style:text-underline-style="none" officeooo:paragraph-rsid="0003f226" style:font-size-asian="11pt" style:font-size-complex="11pt"/>
    </style:style>
    <style:style style:name="P5" style:family="paragraph" style:parent-style-name="Table_20_Contents">
      <style:paragraph-properties fo:text-align="left" style:justify-single-word="false"/>
      <style:text-properties fo:color="#000000" loext:opacity="100%" style:text-outline="false" style:text-line-through-style="none" style:text-line-through-type="none" style:font-name="Supply1" fo:font-size="11pt" fo:font-style="normal" fo:text-shadow="none" style:text-underline-style="none" fo:font-weight="normal" officeooo:rsid="0003f226" officeooo:paragraph-rsid="0003f226"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3f226" officeooo:paragraph-rsid="0003f226"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54258" officeooo:paragraph-rsid="00054258"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list-style-name="L1">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54258" officeooo:paragraph-rsid="00054258"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545cd" officeooo:paragraph-rsid="000545cd"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list-style-name="L2">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545cd" officeooo:paragraph-rsid="000545cd"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list-style-name="L2">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0522" officeooo:paragraph-rsid="00070522"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0522" officeooo:paragraph-rsid="00070522"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list-style-name="L3">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0522" officeooo:paragraph-rsid="00070522"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list-style-name="L3">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fdc7" officeooo:paragraph-rsid="0007fdc7"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fdc7" officeooo:paragraph-rsid="0007fdc7"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list-style-name="L4">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fdc7" officeooo:paragraph-rsid="0007fdc7"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list-style-name="L5">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fdc7" officeooo:paragraph-rsid="0007fdc7"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list-style-name="L5">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7fdc7" officeooo:paragraph-rsid="0009c3c5"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list-style-name="L5">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9c3c5" officeooo:paragraph-rsid="0009c3c5"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Supply1" fo:font-size="11pt" fo:font-style="normal" fo:text-shadow="none" style:text-underline-style="none" fo:font-weight="normal" officeooo:rsid="0009c3c5" officeooo:paragraph-rsid="0009c3c5"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loext:graphic-properties draw:fill="none"/>
      <style:paragraph-properties fo:margin-left="0in" fo:margin-right="0in" fo:text-indent="0.5in" style:auto-text-indent="false" fo:background-color="transparent"/>
      <style:text-properties style:font-name="Supply1" fo:font-size="11pt" fo:language="es" fo:country="AR" style:text-underline-style="none" officeooo:paragraph-rsid="0003f226" style:font-size-asian="11pt" style:font-size-complex="11pt"/>
    </style:style>
    <style:style style:name="P22" style:family="paragraph" style:parent-style-name="Standard">
      <loext:graphic-properties draw:fill="none"/>
      <style:paragraph-properties fo:margin-left="0in" fo:margin-right="0in" fo:text-indent="0in" style:auto-text-indent="false" fo:background-color="transparent"/>
      <style:text-properties style:font-name="Supply1" fo:font-size="11pt" fo:language="es" fo:country="AR" style:text-underline-style="none" officeooo:paragraph-rsid="0003f226" style:font-size-asian="11pt" style:font-size-complex="11pt"/>
    </style:style>
    <style:style style:name="P23" style:family="paragraph" style:parent-style-name="Standard">
      <style:text-properties style:font-name="Supply1" fo:font-size="11pt" fo:language="es" fo:country="AR" style:text-underline-style="none" officeooo:paragraph-rsid="0009c3c5" style:font-size-asian="11pt" style:font-size-complex="11pt"/>
    </style:style>
    <style:style style:name="P24"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Supply1" fo:font-size="11pt" fo:language="es" fo:country="AR" style:text-underline-style="none" officeooo:rsid="0009c3c5" officeooo:paragraph-rsid="0009c3c5" style:font-size-asian="11pt" style:font-size-complex="11pt"/>
    </style:style>
    <style:style style:name="P25" style:family="paragraph" style:parent-style-name="Standard">
      <loext:graphic-properties draw:fill="none"/>
      <style:paragraph-properties fo:margin-left="0.5in" fo:margin-right="0in" fo:text-indent="0in" style:auto-text-indent="false" fo:background-color="transparent"/>
      <style:text-properties style:font-name="Supply1" fo:font-size="11pt" fo:language="es" fo:country="AR" style:text-underline-style="none" officeooo:rsid="0009c3c5" officeooo:paragraph-rsid="0009c3c5" style:font-size-asian="11pt" style:font-size-complex="11pt"/>
    </style:style>
    <style:style style:name="P26" style:family="paragraph" style:parent-style-name="Standard">
      <style:text-properties style:font-name="Supply1" fo:font-size="11pt" fo:language="es" fo:country="AR" style:text-underline-style="none" officeooo:paragraph-rsid="000ad152" style:font-size-asian="11pt" style:font-size-complex="11pt"/>
    </style:style>
    <style:style style:name="P27"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Supply1" fo:font-size="11pt" fo:language="es" fo:country="AR" style:text-underline-style="none" officeooo:paragraph-rsid="000ad152" style:font-size-asian="11pt" style:font-size-complex="11pt"/>
    </style:style>
    <style:style style:name="P28" style:family="paragraph" style:parent-style-name="Standard">
      <loext:graphic-properties draw:fill="none"/>
      <style:paragraph-properties fo:margin-left="0.5in" fo:margin-right="0in" fo:text-indent="0in" style:auto-text-indent="false" fo:background-color="transparent"/>
      <style:text-properties style:font-name="Supply1" fo:font-size="11pt" fo:language="es" fo:country="AR" style:text-underline-style="none" officeooo:paragraph-rsid="000ad152" style:font-size-asian="11pt" style:font-size-complex="11pt"/>
    </style:style>
    <style:style style:name="P29" style:family="paragraph" style:parent-style-name="Standard">
      <loext:graphic-properties draw:fill="none"/>
      <style:paragraph-properties fo:margin-left="0in" fo:margin-right="0in" fo:text-indent="0in" style:auto-text-indent="false" fo:background-color="transparent"/>
      <style:text-properties style:font-name="Supply1" fo:font-size="11pt" fo:language="es" fo:country="AR" style:text-underline-style="none" officeooo:paragraph-rsid="000ad152" style:font-size-asian="11pt" style:font-size-complex="11pt"/>
    </style:style>
    <style:style style:name="P30" style:family="paragraph" style:parent-style-name="Standard">
      <loext:graphic-properties draw:fill="none"/>
      <style:paragraph-properties fo:margin-left="0.5618in" fo:margin-right="0in" fo:text-indent="0in" style:auto-text-indent="false" fo:background-color="transparent"/>
      <style:text-properties style:font-name="Supply1" fo:font-size="11pt" fo:language="es" fo:country="AR" style:text-underline-style="none" officeooo:paragraph-rsid="000ad152" style:font-size-asian="11pt" style:font-size-complex="11pt"/>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upply1" fo:font-size="11pt" fo:language="es" fo:country="AR" style:text-underline-style="none" officeooo:paragraph-rsid="000c2b4e" style:font-size-asian="11pt" style:font-size-complex="11pt"/>
    </style:style>
    <style:style style:name="P32"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Supply1" fo:font-size="11pt" fo:language="es" fo:country="AR" style:text-underline-style="none" officeooo:paragraph-rsid="000c2b4e" style:font-size-asian="11pt" style:font-size-complex="11pt"/>
    </style:style>
    <style:style style:name="P33" style:family="paragraph" style:parent-style-name="Standard">
      <loext:graphic-properties draw:fill="none"/>
      <style:paragraph-properties fo:margin-left="0.5in" fo:margin-right="0in" fo:text-indent="0in" style:auto-text-indent="false" fo:background-color="transparent"/>
      <style:text-properties style:font-name="Supply1" fo:font-size="11pt" fo:language="es" fo:country="AR" style:text-underline-style="none" officeooo:paragraph-rsid="000c2b4e" style:font-size-asian="11pt" style:font-size-complex="11pt"/>
    </style:style>
    <style:style style:name="P34" style:family="paragraph" style:parent-style-name="Standard">
      <style:text-properties style:font-name="Supply"/>
    </style:style>
    <style:style style:name="P35" style:family="paragraph" style:parent-style-name="Table_20_Contents">
      <style:text-properties style:font-name="Supply" officeooo:rsid="000df8a0" officeooo:paragraph-rsid="000df8a0"/>
    </style:style>
    <style:style style:name="P36" style:family="paragraph" style:parent-style-name="Table_20_Contents">
      <style:text-properties style:font-name="Supply" officeooo:rsid="000fb75c" officeooo:paragraph-rsid="000fb75c"/>
    </style:style>
    <style:style style:name="P37" style:family="paragraph" style:parent-style-name="Table_20_Contents">
      <style:text-properties style:font-name="Supply" officeooo:rsid="000df8a0" officeooo:paragraph-rsid="000fb75c"/>
    </style:style>
    <style:style style:name="P38" style:family="paragraph" style:parent-style-name="Table_20_Contents">
      <style:text-properties style:font-name="Supply" officeooo:rsid="00143e00" officeooo:paragraph-rsid="00143e00"/>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Supply1" fo:font-size="11pt" fo:language="es" fo:country="AR" style:text-underline-style="none" officeooo:rsid="00143e00" officeooo:paragraph-rsid="00143e00" style:font-size-asian="11pt" style:font-size-complex="11pt"/>
    </style:style>
    <style:style style:name="P40" style:family="paragraph" style:parent-style-name="Standard">
      <style:text-properties style:font-name="Supply" officeooo:paragraph-rsid="00143e00"/>
    </style:style>
    <style:style style:name="P41"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Supply" officeooo:rsid="00143e00" officeooo:paragraph-rsid="00143e00"/>
    </style:style>
    <style:style style:name="P42" style:family="paragraph" style:parent-style-name="Standard">
      <style:text-properties style:font-name="Supply" officeooo:rsid="00143e00" officeooo:paragraph-rsid="00143e00"/>
    </style:style>
    <style:style style:name="P43" style:family="paragraph" style:parent-style-name="Standard">
      <style:text-properties style:font-name="Supply" officeooo:paragraph-rsid="0016129c"/>
    </style:style>
    <style:style style:name="P4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paragraph-rsid="0016129c"/>
    </style:style>
    <style:style style:name="P45" style:family="paragraph" style:parent-style-name="Standard">
      <loext:graphic-properties draw:fill="none"/>
      <style:paragraph-properties fo:margin-left="0.5in" fo:margin-right="0in" fo:text-indent="0in" style:auto-text-indent="false" fo:background-color="transparent"/>
      <style:text-properties style:font-name="Supply" officeooo:rsid="0016129c" officeooo:paragraph-rsid="0016129c"/>
    </style:style>
    <style:style style:name="P4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16129c" officeooo:paragraph-rsid="0016129c"/>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upply" officeooo:rsid="0016129c" officeooo:paragraph-rsid="0016129c"/>
    </style:style>
    <style:style style:name="P48" style:family="paragraph" style:parent-style-name="Standard">
      <style:text-properties style:font-name="Supply" officeooo:paragraph-rsid="0016cf7f"/>
    </style:style>
    <style:style style:name="P49" style:family="paragraph" style:parent-style-name="Standard" style:list-style-name="L6">
      <style:text-properties style:font-name="Supply" officeooo:rsid="0016cf7f" officeooo:paragraph-rsid="0016cf7f"/>
    </style:style>
    <style:style style:name="P50" style:family="paragraph" style:parent-style-name="Standard">
      <style:text-properties style:font-name="Supply" officeooo:rsid="0016cf7f" officeooo:paragraph-rsid="0016cf7f"/>
    </style:style>
    <style:style style:name="P51" style:family="paragraph" style:parent-style-name="Standard">
      <style:text-properties style:font-name="Supply" officeooo:paragraph-rsid="0018c496"/>
    </style:style>
    <style:style style:name="P52" style:family="paragraph" style:parent-style-name="Standard" style:list-style-name="L7">
      <style:text-properties style:font-name="Supply" officeooo:rsid="0018c496" officeooo:paragraph-rsid="0018c496"/>
    </style:style>
    <style:style style:name="P53" style:family="paragraph" style:parent-style-name="Standard">
      <style:text-properties style:font-name="Supply" officeooo:rsid="0018c496" officeooo:paragraph-rsid="0018c496"/>
    </style:style>
    <style:style style:name="P54" style:family="paragraph" style:parent-style-name="Standard">
      <style:text-properties style:font-name="Supply" officeooo:paragraph-rsid="00198ed8"/>
    </style:style>
    <style:style style:name="P5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paragraph-rsid="00198ed8"/>
    </style:style>
    <style:style style:name="P56" style:family="paragraph" style:parent-style-name="Standard">
      <loext:graphic-properties draw:fill="none"/>
      <style:paragraph-properties fo:margin-left="0.8118in" fo:margin-right="0in" fo:text-indent="0in" style:auto-text-indent="false" fo:background-color="transparent"/>
      <style:text-properties style:font-name="Supply" officeooo:paragraph-rsid="00198ed8"/>
    </style:style>
    <style:style style:name="P5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198ed8" officeooo:paragraph-rsid="00198ed8"/>
    </style:style>
    <style:style style:name="P58" style:family="paragraph" style:parent-style-name="Standard">
      <loext:graphic-properties draw:fill="none"/>
      <style:paragraph-properties fo:margin-left="0.8118in" fo:margin-right="0in" fo:text-indent="0in" style:auto-text-indent="false" fo:background-color="transparent"/>
      <style:text-properties style:font-name="Supply" officeooo:rsid="00198ed8" officeooo:paragraph-rsid="00198ed8"/>
    </style:style>
    <style:style style:name="P59" style:family="paragraph" style:parent-style-name="Standard">
      <loext:graphic-properties draw:fill="none"/>
      <style:paragraph-properties fo:margin-left="0.5in" fo:margin-right="0in" fo:text-indent="0in" style:auto-text-indent="false" fo:background-color="transparent"/>
      <style:text-properties style:font-name="Supply" officeooo:rsid="00198ed8" officeooo:paragraph-rsid="00198ed8"/>
    </style:style>
    <style:style style:name="P60" style:family="paragraph" style:parent-style-name="Standard">
      <loext:graphic-properties draw:fill="none"/>
      <style:paragraph-properties fo:margin-left="0.5in" fo:margin-right="0in" fo:text-indent="0in" style:auto-text-indent="false" fo:background-color="transparent"/>
      <style:text-properties style:font-name="Supply" officeooo:paragraph-rsid="00198ed8"/>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upply" officeooo:rsid="00198ed8" officeooo:paragraph-rsid="00198ed8"/>
    </style:style>
    <style:style style:name="P62" style:family="paragraph" style:parent-style-name="Standard">
      <style:text-properties style:font-name="Supply" officeooo:paragraph-rsid="001cc856"/>
    </style:style>
    <style:style style:name="P6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1d9ddb" officeooo:paragraph-rsid="001d9ddb"/>
    </style:style>
    <style:style style:name="P64" style:family="paragraph" style:parent-style-name="Standard">
      <loext:graphic-properties draw:fill="none"/>
      <style:paragraph-properties fo:margin-left="0.5in" fo:margin-right="0in" fo:text-indent="0in" style:auto-text-indent="false" fo:background-color="transparent"/>
      <style:text-properties style:font-name="Supply" officeooo:rsid="001d9ddb" officeooo:paragraph-rsid="001d9ddb"/>
    </style:style>
    <style:style style:name="P65" style:family="paragraph" style:parent-style-name="Standard">
      <loext:graphic-properties draw:fill="none"/>
      <style:paragraph-properties fo:margin-left="0.5in" fo:margin-right="0in" fo:text-indent="0in" style:auto-text-indent="false" fo:background-color="transparent"/>
      <style:text-properties style:font-name="Supply" officeooo:rsid="001d9ddb" officeooo:paragraph-rsid="001f6717"/>
    </style:style>
    <style:style style:name="P66" style:family="paragraph" style:parent-style-name="Standard">
      <loext:graphic-properties draw:fill="none"/>
      <style:paragraph-properties fo:margin-left="0.5in" fo:margin-right="0in" fo:text-indent="0in" style:auto-text-indent="false" fo:background-color="transparent"/>
      <style:text-properties style:font-name="Supply" officeooo:rsid="001f6717" officeooo:paragraph-rsid="001f6717"/>
    </style:style>
    <style:style style:name="P67" style:family="paragraph" style:parent-style-name="Standard">
      <loext:graphic-properties draw:fill="none"/>
      <style:paragraph-properties fo:margin-left="0.8118in" fo:margin-right="0in" fo:text-indent="0in" style:auto-text-indent="false" fo:background-color="transparent"/>
      <style:text-properties style:font-name="Supply" officeooo:rsid="001f6717" officeooo:paragraph-rsid="001f6717"/>
    </style:style>
    <style:style style:name="P68" style:family="paragraph" style:parent-style-name="Standard">
      <style:text-properties style:font-name="Supply" officeooo:paragraph-rsid="00200854"/>
    </style:style>
    <style:style style:name="P6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00854" officeooo:paragraph-rsid="00200854"/>
    </style:style>
    <style:style style:name="P70" style:family="paragraph" style:parent-style-name="Standard">
      <loext:graphic-properties draw:fill="none"/>
      <style:paragraph-properties fo:margin-left="0.5in" fo:margin-right="0in" fo:text-indent="0in" style:auto-text-indent="false" fo:background-color="transparent"/>
      <style:text-properties style:font-name="Supply" officeooo:paragraph-rsid="00200854"/>
    </style:style>
    <style:style style:name="P71" style:family="paragraph" style:parent-style-name="Standard">
      <loext:graphic-properties draw:fill="none"/>
      <style:paragraph-properties fo:margin-left="0.5in" fo:margin-right="0in" fo:text-indent="0in" style:auto-text-indent="false" fo:background-color="transparent"/>
      <style:text-properties style:font-name="Supply" officeooo:rsid="00200854" officeooo:paragraph-rsid="00200854"/>
    </style:style>
    <style:style style:name="P7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paragraph-rsid="001cc856"/>
    </style:style>
    <style:style style:name="P7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upply" officeooo:paragraph-rsid="001cc856"/>
    </style:style>
    <style:style style:name="P74" style:family="paragraph" style:parent-style-name="Standard">
      <loext:graphic-properties draw:fill="none"/>
      <style:paragraph-properties fo:margin-left="0in" fo:margin-right="0in" fo:text-indent="0in" style:auto-text-indent="false" fo:background-color="transparent"/>
      <style:text-properties style:font-name="Supply" officeooo:rsid="0021a82c" officeooo:paragraph-rsid="0021a82c"/>
    </style:style>
    <style:style style:name="P75" style:family="paragraph" style:parent-style-name="Standard" style:list-style-name="L8" style:master-page-name="">
      <loext:graphic-properties draw:fill="none"/>
      <style:paragraph-properties style:page-number="auto" fo:background-color="transparent"/>
      <style:text-properties style:font-name="Supply" officeooo:rsid="0021a82c" officeooo:paragraph-rsid="0021a82c"/>
    </style:style>
    <style:style style:name="P76" style:family="paragraph" style:parent-style-name="Standard" style:list-style-name="L8">
      <loext:graphic-properties draw:fill="none"/>
      <style:paragraph-properties fo:background-color="transparent"/>
      <style:text-properties style:font-name="Supply" officeooo:rsid="0021a82c" officeooo:paragraph-rsid="0021a82c"/>
    </style:style>
    <style:style style:name="P77" style:family="paragraph" style:parent-style-name="Standard">
      <loext:graphic-properties draw:fill="none"/>
      <style:paragraph-properties fo:background-color="transparent"/>
      <style:text-properties style:font-name="Supply" officeooo:rsid="0021a82c" officeooo:paragraph-rsid="0021a82c"/>
    </style:style>
    <style:style style:name="P7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1a82c" officeooo:paragraph-rsid="0021a82c"/>
    </style:style>
    <style:style style:name="P79" style:family="paragraph" style:parent-style-name="Standard">
      <loext:graphic-properties draw:fill="none"/>
      <style:paragraph-properties fo:margin-left="0.8118in" fo:margin-right="0in" fo:text-indent="0in" style:auto-text-indent="false" fo:background-color="transparent"/>
      <style:text-properties style:font-name="Supply" officeooo:rsid="0021a82c" officeooo:paragraph-rsid="0021a82c"/>
    </style:style>
    <style:style style:name="P80" style:family="paragraph" style:parent-style-name="Standard">
      <loext:graphic-properties draw:fill="none"/>
      <style:paragraph-properties fo:margin-left="0in" fo:margin-right="0in" fo:text-indent="0in" style:auto-text-indent="false" fo:background-color="transparent"/>
      <style:text-properties style:font-name="Supply" officeooo:rsid="00225d02" officeooo:paragraph-rsid="00225d02"/>
    </style:style>
    <style:style style:name="P81" style:family="paragraph" style:parent-style-name="Standard" style:master-page-name="">
      <loext:graphic-properties draw:fill="none"/>
      <style:paragraph-properties fo:margin-left="0.5in" fo:margin-right="0in" fo:text-indent="0in" style:auto-text-indent="false" style:page-number="auto" fo:background-color="transparent">
        <style:tab-stops/>
      </style:paragraph-properties>
      <style:text-properties style:font-name="Supply" officeooo:rsid="00225d02" officeooo:paragraph-rsid="00225d02"/>
    </style:style>
    <style:style style:name="P82" style:family="paragraph" style:parent-style-name="Standard">
      <loext:graphic-properties draw:fill="none"/>
      <style:paragraph-properties fo:margin-left="0.5in" fo:margin-right="0in" fo:text-indent="0in" style:auto-text-indent="false" fo:background-color="transparent">
        <style:tab-stops/>
      </style:paragraph-properties>
      <style:text-properties style:font-name="Supply" officeooo:rsid="00225d02" officeooo:paragraph-rsid="00225d02"/>
    </style:style>
    <style:style style:name="P83" style:family="paragraph" style:parent-style-name="Standard">
      <loext:graphic-properties draw:fill="none"/>
      <style:paragraph-properties fo:margin-left="0.8118in" fo:margin-right="0in" fo:text-indent="0in" style:auto-text-indent="false" fo:background-color="transparent"/>
      <style:text-properties style:font-name="Supply" officeooo:rsid="00225d02" officeooo:paragraph-rsid="00225d02"/>
    </style:style>
    <style:style style:name="P8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25d02" officeooo:paragraph-rsid="00225d02"/>
    </style:style>
    <style:style style:name="P85" style:family="paragraph" style:parent-style-name="Standard">
      <loext:graphic-properties draw:fill="none"/>
      <style:paragraph-properties fo:margin-left="0.5in" fo:margin-right="0in" fo:text-indent="0in" style:auto-text-indent="false" fo:background-color="transparent"/>
      <style:text-properties style:font-name="Supply" officeooo:rsid="00225d02" officeooo:paragraph-rsid="00225d02"/>
    </style:style>
    <style:style style:name="P86" style:family="paragraph" style:parent-style-name="Standard">
      <loext:graphic-properties draw:fill="none"/>
      <style:paragraph-properties fo:margin-left="0.5in" fo:margin-right="0in" fo:text-indent="0in" style:auto-text-indent="false" fo:background-color="transparent"/>
      <style:text-properties style:font-name="Supply" officeooo:rsid="0026f99f" officeooo:paragraph-rsid="0026f99f"/>
    </style:style>
    <style:style style:name="P87" style:family="paragraph" style:parent-style-name="Standard">
      <loext:graphic-properties draw:fill="none"/>
      <style:paragraph-properties fo:margin-left="0in" fo:margin-right="0in" fo:text-indent="0in" style:auto-text-indent="false" fo:background-color="transparent"/>
      <style:text-properties style:font-name="Supply" officeooo:rsid="00225d02" officeooo:paragraph-rsid="00276973"/>
    </style:style>
    <style:style style:name="P8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25d02" officeooo:paragraph-rsid="00276973"/>
    </style:style>
    <style:style style:name="P89" style:family="paragraph" style:parent-style-name="Standard">
      <loext:graphic-properties draw:fill="none"/>
      <style:paragraph-properties fo:margin-left="0.5in" fo:margin-right="0in" fo:text-indent="0in" style:auto-text-indent="false" fo:background-color="transparent"/>
      <style:text-properties officeooo:paragraph-rsid="00278709"/>
    </style:style>
    <style:style style:name="P90" style:family="paragraph" style:parent-style-name="Standard">
      <loext:graphic-properties draw:fill="none"/>
      <style:paragraph-properties fo:margin-left="0.5in" fo:margin-right="0in" fo:text-indent="0in" style:auto-text-indent="false" fo:background-color="transparent"/>
      <style:text-properties style:font-name="Supply" officeooo:rsid="00276973" officeooo:paragraph-rsid="00276973"/>
    </style:style>
    <style:style style:name="P91" style:family="paragraph" style:parent-style-name="Standard">
      <loext:graphic-properties draw:fill="none"/>
      <style:paragraph-properties fo:margin-left="0.8118in" fo:margin-right="0in" fo:text-indent="0in" style:auto-text-indent="false" fo:background-color="transparent"/>
      <style:text-properties style:font-name="Supply" officeooo:rsid="00276973" officeooo:paragraph-rsid="00276973"/>
    </style:style>
    <style:style style:name="P92" style:family="paragraph" style:parent-style-name="Standard">
      <loext:graphic-properties draw:fill="none"/>
      <style:paragraph-properties fo:margin-left="0in" fo:margin-right="0in" fo:text-indent="0in" style:auto-text-indent="false" fo:background-color="transparent"/>
      <style:text-properties style:font-name="Supply" officeooo:rsid="00225d02" officeooo:paragraph-rsid="00278709"/>
    </style:style>
    <style:style style:name="P9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25d02" officeooo:paragraph-rsid="00278709"/>
    </style:style>
    <style:style style:name="P94" style:family="paragraph" style:parent-style-name="Standard">
      <loext:graphic-properties draw:fill="none"/>
      <style:paragraph-properties fo:margin-left="0.8118in" fo:margin-right="0in" fo:text-indent="0in" style:auto-text-indent="false" fo:background-color="transparent"/>
      <style:text-properties style:font-name="Supply" officeooo:rsid="00225d02" officeooo:paragraph-rsid="00278709"/>
    </style:style>
    <style:style style:name="P9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89f3d" officeooo:paragraph-rsid="00289f3d"/>
    </style:style>
    <style:style style:name="P96" style:family="paragraph" style:parent-style-name="Standard">
      <loext:graphic-properties draw:fill="none"/>
      <style:paragraph-properties fo:margin-left="0.5in" fo:margin-right="0in" fo:text-indent="0in" style:auto-text-indent="false" fo:background-color="transparent"/>
      <style:text-properties style:font-name="Supply" officeooo:rsid="00289f3d" officeooo:paragraph-rsid="00289f3d"/>
    </style:style>
    <style:style style:name="P97" style:family="paragraph" style:parent-style-name="Standard">
      <loext:graphic-properties draw:fill="none"/>
      <style:paragraph-properties fo:margin-left="0in" fo:margin-right="0in" fo:text-indent="0in" style:auto-text-indent="false" fo:background-color="transparent"/>
      <style:text-properties style:font-name="Supply" officeooo:rsid="0028cad9" officeooo:paragraph-rsid="0028cad9"/>
    </style:style>
    <style:style style:name="P98" style:family="paragraph" style:parent-style-name="Standard" style:list-style-name="L9" style:master-page-name="">
      <loext:graphic-properties draw:fill="none"/>
      <style:paragraph-properties style:page-number="auto" fo:background-color="transparent"/>
      <style:text-properties style:font-name="Supply" officeooo:rsid="0028cad9" officeooo:paragraph-rsid="0028cad9"/>
    </style:style>
    <style:style style:name="P99" style:family="paragraph" style:parent-style-name="Standard" style:list-style-name="L9">
      <loext:graphic-properties draw:fill="none"/>
      <style:paragraph-properties fo:background-color="transparent"/>
      <style:text-properties style:font-name="Supply" officeooo:rsid="0028cad9" officeooo:paragraph-rsid="0028cad9"/>
    </style:style>
    <style:style style:name="P100" style:family="paragraph" style:parent-style-name="Standard">
      <loext:graphic-properties draw:fill="none"/>
      <style:paragraph-properties fo:background-color="transparent"/>
      <style:text-properties style:font-name="Supply" officeooo:rsid="0028cad9" officeooo:paragraph-rsid="0028cad9"/>
    </style:style>
    <style:style style:name="P101" style:family="paragraph" style:parent-style-name="Standard">
      <loext:graphic-properties draw:fill="none"/>
      <style:paragraph-properties fo:background-color="transparent"/>
      <style:text-properties style:font-name="Supply" officeooo:rsid="0028d690" officeooo:paragraph-rsid="0028d690"/>
    </style:style>
    <style:style style:name="P102" style:family="paragraph" style:parent-style-name="Standard">
      <loext:graphic-properties draw:fill="none"/>
      <style:paragraph-properties fo:margin-top="0in" fo:margin-bottom="0.1965in" style:contextual-spacing="false" fo:background-color="transparent"/>
      <style:text-properties style:font-name="Supply" officeooo:rsid="0028d690" officeooo:paragraph-rsid="0028d690"/>
    </style:style>
    <style:style style:name="P103" style:family="paragraph" style:parent-style-name="Standard" style:master-page-name="">
      <style:paragraph-properties fo:margin-left="0.5in" fo:margin-right="0in" fo:text-indent="0in" style:auto-text-indent="false" style:page-number="auto"/>
      <style:text-properties style:font-name="Supply" officeooo:rsid="00289f3d" officeooo:paragraph-rsid="0028d690"/>
    </style:style>
    <style:style style:name="P104" style:family="paragraph" style:parent-style-name="Standard">
      <style:paragraph-properties fo:margin-left="0.5in" fo:margin-right="0in" fo:text-indent="0in" style:auto-text-indent="false"/>
      <style:text-properties style:font-name="Supply" officeooo:rsid="00289f3d" officeooo:paragraph-rsid="0028d690"/>
    </style:style>
    <style:style style:name="P105" style:family="paragraph" style:parent-style-name="Standard">
      <style:paragraph-properties fo:margin-left="0.5in" fo:margin-right="0in" fo:text-indent="0in" style:auto-text-indent="false"/>
      <style:text-properties style:font-name="Supply" officeooo:rsid="00289f3d" officeooo:paragraph-rsid="00289f3d"/>
    </style:style>
    <style:style style:name="P106" style:family="paragraph" style:parent-style-name="Standard">
      <loext:graphic-properties draw:fill="none"/>
      <style:paragraph-properties fo:background-color="transparent"/>
      <style:text-properties style:font-name="Supply" officeooo:rsid="0028d690" officeooo:paragraph-rsid="002d2bb4"/>
    </style:style>
    <style:style style:name="P10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8d690" officeooo:paragraph-rsid="002d2bb4"/>
    </style:style>
    <style:style style:name="P108" style:family="paragraph" style:parent-style-name="Standard">
      <loext:graphic-properties draw:fill="none"/>
      <style:paragraph-properties fo:margin-left="0.5in" fo:margin-right="0in" fo:text-indent="0in" style:auto-text-indent="false" fo:background-color="transparent"/>
      <style:text-properties style:font-name="Supply" officeooo:rsid="0028d690" officeooo:paragraph-rsid="002d2bb4"/>
    </style:style>
    <style:style style:name="P109" style:family="paragraph" style:parent-style-name="Standard">
      <loext:graphic-properties draw:fill="none"/>
      <style:paragraph-properties fo:margin-left="0.5in" fo:margin-right="0in" fo:text-indent="0in" style:auto-text-indent="false" fo:background-color="transparent"/>
      <style:text-properties style:font-name="Supply" officeooo:rsid="002d2bb4" officeooo:paragraph-rsid="002d2bb4"/>
    </style:style>
    <style:style style:name="P110" style:family="paragraph" style:parent-style-name="Standard">
      <loext:graphic-properties draw:fill="none"/>
      <style:paragraph-properties fo:margin-left="0in" fo:margin-right="0in" fo:text-indent="0in" style:auto-text-indent="false" fo:background-color="transparent"/>
      <style:text-properties style:font-name="Supply" officeooo:rsid="002ec4a8" officeooo:paragraph-rsid="002ec4a8"/>
    </style:style>
    <style:style style:name="P11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officeooo:rsid="002ec4a8" officeooo:paragraph-rsid="002ec4a8"/>
    </style:style>
    <style:style style:name="P112" style:family="paragraph" style:parent-style-name="Standard">
      <loext:graphic-properties draw:fill="none"/>
      <style:paragraph-properties fo:margin-left="0.5in" fo:margin-right="0in" fo:text-indent="0in" style:auto-text-indent="false" fo:background-color="transparent"/>
      <style:text-properties style:font-name="Supply" officeooo:rsid="002ec4a8" officeooo:paragraph-rsid="002ec4a8"/>
    </style:style>
    <style:style style:name="P113" style:family="paragraph" style:parent-style-name="Standard">
      <loext:graphic-properties draw:fill="none"/>
      <style:paragraph-properties fo:margin-left="0in" fo:margin-right="0in" fo:text-indent="0in" style:auto-text-indent="false" fo:background-color="transparent"/>
      <style:text-properties style:font-name="Supply" officeooo:rsid="002ec4a8" officeooo:paragraph-rsid="002efb11"/>
    </style:style>
    <style:style style:name="P114"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2ec4a8" officeooo:paragraph-rsid="002efb11" style:font-style-asian="normal" style:font-weight-asian="normal" style:font-style-complex="normal" style:font-weight-complex="normal"/>
    </style:style>
    <style:style style:name="P115" style:family="paragraph" style:parent-style-name="Standard">
      <loext:graphic-properties draw:fill="none"/>
      <style:paragraph-properties fo:margin-left="0in" fo:margin-right="0in" fo:text-indent="0in" style:auto-text-indent="false" fo:background-color="transparent"/>
      <style:text-properties style:font-name="Supply" fo:font-style="normal" fo:font-weight="normal" officeooo:rsid="002ec4a8" officeooo:paragraph-rsid="002efb11" style:font-style-asian="normal" style:font-weight-asian="normal" style:font-style-complex="normal" style:font-weight-complex="normal"/>
    </style:style>
    <style:style style:name="P116" style:family="paragraph" style:parent-style-name="Standard">
      <loext:graphic-properties draw:fill="none"/>
      <style:paragraph-properties fo:margin-left="0in" fo:margin-right="0in" fo:text-indent="0in" style:auto-text-indent="false" fo:background-color="transparent"/>
      <style:text-properties style:font-name="Supply" fo:font-style="normal" fo:font-weight="normal" officeooo:rsid="002f075a" officeooo:paragraph-rsid="002f075a" style:font-style-asian="normal" style:font-weight-asian="normal" style:font-style-complex="normal" style:font-weight-complex="normal"/>
    </style:style>
    <style:style style:name="P11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2f075a" officeooo:paragraph-rsid="002f075a" style:font-style-asian="normal" style:font-weight-asian="normal" style:font-style-complex="normal" style:font-weight-complex="normal"/>
    </style:style>
    <style:style style:name="P118"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2f075a" officeooo:paragraph-rsid="002f075a" style:font-style-asian="normal" style:font-weight-asian="normal" style:font-style-complex="normal" style:font-weight-complex="normal"/>
    </style:style>
    <style:style style:name="P119" style:family="paragraph" style:parent-style-name="Standard">
      <loext:graphic-properties draw:fill="none"/>
      <style:paragraph-properties fo:margin-left="0in" fo:margin-right="0in" fo:text-indent="0in" style:auto-text-indent="false" fo:background-color="transparent"/>
      <style:text-properties style:font-name="Supply" fo:font-style="normal" fo:font-weight="normal" officeooo:rsid="002f075a" officeooo:paragraph-rsid="0034f64b" style:font-style-asian="normal" style:font-weight-asian="normal" style:font-style-complex="normal" style:font-weight-complex="normal"/>
    </style:style>
    <style:style style:name="P120" style:family="paragraph" style:parent-style-name="Standard" style:list-style-name="L10" style:master-page-name="">
      <loext:graphic-properties draw:fill="none"/>
      <style:paragraph-properties style:page-number="auto" fo:background-color="transparent"/>
      <style:text-properties style:font-name="Supply" fo:font-style="normal" fo:font-weight="normal" officeooo:rsid="0034f64b" officeooo:paragraph-rsid="0034f64b" style:font-style-asian="normal" style:font-weight-asian="normal" style:font-style-complex="normal" style:font-weight-complex="normal"/>
    </style:style>
    <style:style style:name="P121" style:family="paragraph" style:parent-style-name="Standard" style:list-style-name="L10">
      <loext:graphic-properties draw:fill="none"/>
      <style:paragraph-properties fo:background-color="transparent"/>
      <style:text-properties style:font-name="Supply" fo:font-style="normal" fo:font-weight="normal" officeooo:rsid="0034f64b" officeooo:paragraph-rsid="0034f64b" style:font-style-asian="normal" style:font-weight-asian="normal" style:font-style-complex="normal" style:font-weight-complex="normal"/>
    </style:style>
    <style:style style:name="P12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4f64b" officeooo:paragraph-rsid="0034f64b" style:font-style-asian="normal" style:font-weight-asian="normal" style:font-style-complex="normal" style:font-weight-complex="normal"/>
    </style:style>
    <style:style style:name="P123"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34f64b" officeooo:paragraph-rsid="0034f64b" style:font-style-asian="normal" style:font-weight-asian="normal" style:font-style-complex="normal" style:font-weight-complex="normal"/>
    </style:style>
    <style:style style:name="P12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2f075a" officeooo:paragraph-rsid="0034f64b" style:font-style-asian="normal" style:font-weight-asian="normal" style:font-style-complex="normal" style:font-weight-complex="normal"/>
    </style:style>
    <style:style style:name="P125"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2f075a" officeooo:paragraph-rsid="0034f64b" style:font-style-asian="normal" style:font-weight-asian="normal" style:font-style-complex="normal" style:font-weight-complex="normal"/>
    </style:style>
    <style:style style:name="P12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5b78d" officeooo:paragraph-rsid="0035b78d" style:font-style-asian="normal" style:font-weight-asian="normal" style:font-style-complex="normal" style:font-weight-complex="normal"/>
    </style:style>
    <style:style style:name="P127"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35b78d" officeooo:paragraph-rsid="0035b78d" style:font-style-asian="normal" style:font-weight-asian="normal" style:font-style-complex="normal" style:font-weight-complex="normal"/>
    </style:style>
    <style:style style:name="P128" style:family="paragraph" style:parent-style-name="Standard" style:list-style-name="L11">
      <loext:graphic-properties draw:fill="none"/>
      <style:paragraph-properties fo:background-color="transparent"/>
      <style:text-properties style:font-name="Supply" fo:font-style="normal" fo:font-weight="normal" officeooo:rsid="0035b78d" officeooo:paragraph-rsid="0035b78d" style:font-style-asian="normal" style:font-weight-asian="normal" style:font-style-complex="normal" style:font-weight-complex="normal"/>
    </style:style>
    <style:style style:name="P129" style:family="paragraph" style:parent-style-name="Standard">
      <loext:graphic-properties draw:fill="none"/>
      <style:paragraph-properties fo:background-color="transparent"/>
      <style:text-properties style:font-name="Supply" fo:font-style="normal" fo:font-weight="normal" officeooo:rsid="0035b78d" officeooo:paragraph-rsid="0035b78d" style:font-style-asian="normal" style:font-weight-asian="normal" style:font-style-complex="normal" style:font-weight-complex="normal"/>
    </style:style>
    <style:style style:name="P13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6c45d" officeooo:paragraph-rsid="0036c45d" style:font-style-asian="normal" style:font-weight-asian="normal" style:font-style-complex="normal" style:font-weight-complex="normal"/>
    </style:style>
    <style:style style:name="P131"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36c45d" officeooo:paragraph-rsid="0036c45d" style:font-style-asian="normal" style:font-weight-asian="normal" style:font-style-complex="normal" style:font-weight-complex="normal"/>
    </style:style>
    <style:style style:name="P132" style:family="paragraph" style:parent-style-name="Standard" style:list-style-name="L12">
      <loext:graphic-properties draw:fill="none"/>
      <style:paragraph-properties fo:background-color="transparent"/>
      <style:text-properties style:font-name="Supply" fo:font-style="normal" fo:font-weight="normal" officeooo:rsid="0036c45d" officeooo:paragraph-rsid="0036c45d" style:font-style-asian="normal" style:font-weight-asian="normal" style:font-style-complex="normal" style:font-weight-complex="normal"/>
    </style:style>
    <style:style style:name="P133" style:family="paragraph" style:parent-style-name="Standard">
      <loext:graphic-properties draw:fill="none"/>
      <style:paragraph-properties fo:background-color="transparent"/>
      <style:text-properties style:font-name="Supply" fo:font-style="normal" fo:font-weight="normal" officeooo:rsid="0036c45d" officeooo:paragraph-rsid="0036c45d" style:font-style-asian="normal" style:font-weight-asian="normal" style:font-style-complex="normal" style:font-weight-complex="normal"/>
    </style:style>
    <style:style style:name="P134" style:family="paragraph" style:parent-style-name="Standard">
      <loext:graphic-properties draw:fill="none"/>
      <style:paragraph-properties fo:background-color="transparent"/>
      <style:text-properties style:font-name="Supply" fo:font-style="normal" fo:font-weight="normal" officeooo:rsid="0035b78d" officeooo:paragraph-rsid="0036c45d" style:font-style-asian="normal" style:font-weight-asian="normal" style:font-style-complex="normal" style:font-weight-complex="normal"/>
    </style:style>
    <style:style style:name="P1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5b78d" officeooo:paragraph-rsid="0036c45d" style:font-style-asian="normal" style:font-weight-asian="normal" style:font-style-complex="normal" style:font-weight-complex="normal"/>
    </style:style>
    <style:style style:name="P136" style:family="paragraph" style:parent-style-name="Standard">
      <loext:graphic-properties draw:fill="none"/>
      <style:paragraph-properties fo:margin-left="0.5in" fo:margin-right="0in" fo:text-indent="0in" style:auto-text-indent="false" fo:background-color="transparent"/>
      <style:text-properties style:font-name="Supply" fo:font-weight="normal" officeooo:rsid="0035b78d" officeooo:paragraph-rsid="0036c45d" style:font-weight-asian="normal" style:font-weight-complex="normal"/>
    </style:style>
    <style:style style:name="P13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Supply" fo:font-weight="normal" officeooo:rsid="0035b78d" style:font-weight-asian="normal" style:font-weight-complex="normal"/>
    </style:style>
    <style:style style:name="P138" style:family="paragraph" style:parent-style-name="Standard">
      <loext:graphic-properties draw:fill="none"/>
      <style:paragraph-properties fo:margin-left="0in" fo:margin-right="0in" fo:text-indent="0in" style:auto-text-indent="false" fo:background-color="transparent"/>
      <style:text-properties style:font-name="Supply" fo:font-style="normal" fo:font-weight="normal" officeooo:rsid="0035b78d" officeooo:paragraph-rsid="0036c45d" style:font-style-asian="normal" style:font-weight-asian="normal" style:font-style-complex="normal" style:font-weight-complex="normal"/>
    </style:style>
    <style:style style:name="P139" style:family="paragraph" style:parent-style-name="Standard">
      <loext:graphic-properties draw:fill="none"/>
      <style:paragraph-properties fo:background-color="transparent"/>
      <style:text-properties style:font-name="Supply" fo:font-style="normal" fo:font-weight="normal" officeooo:rsid="0035b78d" officeooo:paragraph-rsid="0037c121" style:font-style-asian="normal" style:font-weight-asian="normal" style:font-style-complex="normal" style:font-weight-complex="normal"/>
    </style:style>
    <style:style style:name="P14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5b78d" officeooo:paragraph-rsid="0037c121" style:font-style-asian="normal" style:font-weight-asian="normal" style:font-style-complex="normal" style:font-weight-complex="normal"/>
    </style:style>
    <style:style style:name="P141" style:family="paragraph" style:parent-style-name="Standard" style:list-style-name="L13" style:master-page-name="">
      <loext:graphic-properties draw:fill="none"/>
      <style:paragraph-properties style:page-number="auto" fo:background-color="transparent"/>
      <style:text-properties style:font-name="Supply" fo:font-style="normal" fo:font-weight="normal" officeooo:rsid="0037c121" officeooo:paragraph-rsid="0037c121" style:font-style-asian="normal" style:font-weight-asian="normal" style:font-style-complex="normal" style:font-weight-complex="normal"/>
    </style:style>
    <style:style style:name="P142" style:family="paragraph" style:parent-style-name="Standard" style:list-style-name="L13">
      <loext:graphic-properties draw:fill="none"/>
      <style:paragraph-properties fo:background-color="transparent"/>
      <style:text-properties style:font-name="Supply" fo:font-style="normal" fo:font-weight="normal" officeooo:rsid="0037c121" officeooo:paragraph-rsid="0037c121" style:font-style-asian="normal" style:font-weight-asian="normal" style:font-style-complex="normal" style:font-weight-complex="normal"/>
    </style:style>
    <style:style style:name="P143" style:family="paragraph" style:parent-style-name="Standard">
      <loext:graphic-properties draw:fill="none"/>
      <style:paragraph-properties fo:background-color="transparent"/>
      <style:text-properties style:font-name="Supply" fo:font-style="normal" fo:font-weight="normal" officeooo:rsid="0037c121" officeooo:paragraph-rsid="0037c121" style:font-style-asian="normal" style:font-weight-asian="normal" style:font-style-complex="normal" style:font-weight-complex="normal"/>
    </style:style>
    <style:style style:name="P144" style:family="paragraph" style:parent-style-name="Standard">
      <loext:graphic-properties draw:fill="none"/>
      <style:paragraph-properties fo:background-color="transparent"/>
      <style:text-properties style:font-name="Supply" fo:font-style="normal" fo:font-weight="normal" officeooo:rsid="0038e444" officeooo:paragraph-rsid="0038e444" style:font-style-asian="normal" style:font-weight-asian="normal" style:font-style-complex="normal" style:font-weight-complex="normal"/>
    </style:style>
    <style:style style:name="P14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8e444" officeooo:paragraph-rsid="0038e444" style:font-style-asian="normal" style:font-weight-asian="normal" style:font-style-complex="normal" style:font-weight-complex="normal"/>
    </style:style>
    <style:style style:name="P146" style:family="paragraph" style:parent-style-name="Standard">
      <loext:graphic-properties draw:fill="none"/>
      <style:paragraph-properties fo:margin-left="0.5in" fo:margin-right="0in" fo:text-indent="0in" style:auto-text-indent="false" fo:background-color="transparent"/>
      <style:text-properties style:font-name="Supply" fo:font-style="normal" fo:font-weight="normal" officeooo:rsid="0038e444" officeooo:paragraph-rsid="0038e444" style:font-style-asian="normal" style:font-weight-asian="normal" style:font-style-complex="normal" style:font-weight-complex="normal"/>
    </style:style>
    <style:style style:name="P147" style:family="paragraph" style:parent-style-name="Standard">
      <loext:graphic-properties draw:fill="none"/>
      <style:paragraph-properties fo:margin-left="0in" fo:margin-right="0in" fo:text-indent="0in" style:auto-text-indent="false" fo:background-color="transparent"/>
      <style:text-properties style:font-name="Supply" fo:font-style="normal" fo:font-weight="normal" officeooo:rsid="0038e444" officeooo:paragraph-rsid="0038e444" style:font-style-asian="normal" style:font-weight-asian="normal" style:font-style-complex="normal" style:font-weight-complex="normal"/>
    </style:style>
    <style:style style:name="P148" style:family="paragraph" style:parent-style-name="Standard">
      <loext:graphic-properties draw:fill="none"/>
      <style:paragraph-properties fo:background-color="transparent"/>
      <style:text-properties style:font-name="Supply" fo:font-style="normal" fo:font-weight="normal" officeooo:rsid="0038e444" officeooo:paragraph-rsid="003a1a0a" style:font-style-asian="normal" style:font-weight-asian="normal" style:font-style-complex="normal" style:font-weight-complex="normal"/>
    </style:style>
    <style:style style:name="P149" style:family="paragraph" style:parent-style-name="Heading_20_3" style:master-page-name="">
      <loext:graphic-properties draw:fill="none"/>
      <style:paragraph-properties fo:margin-left="0.5in" fo:margin-right="0in" fo:text-indent="0in" style:auto-text-indent="false" style:page-number="auto" fo:background-color="transparent"/>
      <style:text-properties style:font-name="Supply" fo:font-size="12pt" fo:font-style="normal" fo:font-weight="normal" officeooo:rsid="0038e444" officeooo:paragraph-rsid="003a1a0a" style:font-size-asian="12pt" style:font-style-asian="normal" style:font-weight-asian="normal" style:font-size-complex="12pt" style:font-style-complex="normal" style:font-weight-complex="normal"/>
    </style:style>
    <style:style style:name="P150" style:family="paragraph" style:parent-style-name="Text_20_body" style:list-style-name="L14">
      <loext:graphic-properties draw:fill="none"/>
      <style:paragraph-properties fo:margin-left="0.5in" fo:margin-right="0in" fo:text-indent="0in" style:auto-text-indent="false" fo:background-color="transparent"/>
      <style:text-properties style:font-name="Supply" fo:font-size="12pt" officeooo:rsid="0038e444" style:font-size-asian="12pt" style:font-size-complex="12pt"/>
    </style:style>
    <style:style style:name="P151" style:family="paragraph" style:parent-style-name="Heading_20_3">
      <loext:graphic-properties draw:fill="none"/>
      <style:paragraph-properties fo:margin-left="0.5in" fo:margin-right="0in" fo:text-indent="0in" style:auto-text-indent="false" fo:background-color="transparent"/>
      <style:text-properties style:font-name="Supply" fo:font-size="12pt" fo:font-weight="normal" officeooo:rsid="0038e444" style:font-size-asian="12pt" style:font-weight-asian="normal" style:font-size-complex="12pt" style:font-weight-complex="normal"/>
    </style:style>
    <style:style style:name="P152" style:family="paragraph" style:parent-style-name="Text_20_body" style:list-style-name="L15">
      <loext:graphic-properties draw:fill="none"/>
      <style:paragraph-properties fo:margin-left="0.5in" fo:margin-right="0in" fo:text-indent="0in" style:auto-text-indent="false" fo:background-color="transparent"/>
      <style:text-properties style:font-name="Supply" fo:font-size="12pt" officeooo:rsid="0038e444" style:font-size-asian="12pt" style:font-size-complex="12pt"/>
    </style:style>
    <style:style style:name="P153" style:family="paragraph" style:parent-style-name="Standard">
      <loext:graphic-properties draw:fill="none"/>
      <style:paragraph-properties fo:background-color="transparent"/>
      <style:text-properties style:font-name="Supply" fo:font-style="normal" fo:font-weight="normal" officeooo:rsid="0038e444" officeooo:paragraph-rsid="003b7764" style:font-style-asian="normal" style:font-weight-asian="normal" style:font-style-complex="normal" style:font-weight-complex="normal"/>
    </style:style>
    <style:style style:name="P154"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Supply" fo:font-style="normal" fo:font-weight="normal" officeooo:rsid="0038e444" officeooo:paragraph-rsid="003b7764" style:font-style-asian="normal" style:font-weight-asian="normal" style:font-style-complex="normal" style:font-weight-complex="normal"/>
    </style:style>
    <style:style style:name="P15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Supply" fo:font-weight="normal" officeooo:rsid="0038e444" style:font-weight-asian="normal" style:font-weight-complex="normal"/>
    </style:style>
    <style:style style:name="P156" style:family="paragraph" style:parent-style-name="Standard">
      <loext:graphic-properties draw:fill="none"/>
      <style:paragraph-properties fo:margin-left="1in" fo:margin-right="0in" fo:text-indent="0in" style:auto-text-indent="false" fo:background-color="transparent"/>
      <style:text-properties style:font-name="Supply" fo:font-style="normal" fo:font-weight="normal" officeooo:rsid="0038e444" officeooo:paragraph-rsid="003b7764" style:font-style-asian="normal" style:font-weight-asian="normal" style:font-style-complex="normal" style:font-weight-complex="normal"/>
    </style:style>
    <style:style style:name="P157" style:family="paragraph" style:parent-style-name="Text_20_body" style:master-page-name="">
      <loext:graphic-properties draw:fill="none"/>
      <style:paragraph-properties fo:margin-left="0.5in" fo:margin-right="0in" fo:text-indent="0in" style:auto-text-indent="false" style:page-number="auto" fo:background-color="transparent"/>
      <style:text-properties style:font-name="Supply" fo:font-style="normal" fo:font-weight="normal" officeooo:rsid="0038e444" officeooo:paragraph-rsid="003b7764" style:font-style-asian="normal" style:font-weight-asian="normal" style:font-style-complex="normal" style:font-weight-complex="normal"/>
    </style:style>
    <style:style style:name="P158" style:family="paragraph" style:parent-style-name="Standard">
      <loext:graphic-properties draw:fill="none"/>
      <style:paragraph-properties fo:margin-left="0in" fo:margin-right="0in" fo:text-indent="0in" style:auto-text-indent="false" fo:background-color="transparent"/>
      <style:text-properties style:font-name="Supply" fo:font-style="normal" fo:font-weight="normal" officeooo:rsid="0038e444" officeooo:paragraph-rsid="003b7764" style:font-style-asian="normal" style:font-weight-asian="normal" style:font-style-complex="normal" style:font-weight-complex="normal"/>
    </style:style>
    <style:style style:name="P159" style:family="paragraph" style:parent-style-name="Standard">
      <loext:graphic-properties draw:fill="none"/>
      <style:paragraph-properties fo:margin-top="0in" fo:margin-bottom="0.1965in" style:contextual-spacing="false" fo:background-color="transparent"/>
      <style:text-properties style:font-name="Supply" fo:font-style="normal" fo:font-weight="normal" officeooo:rsid="0038e444" officeooo:paragraph-rsid="003b7764" style:font-style-asian="normal" style:font-weight-asian="normal" style:font-style-complex="normal" style:font-weight-complex="normal"/>
    </style:style>
    <style:style style:name="P160" style:family="paragraph" style:parent-style-name="Text_20_body" style:master-page-name="">
      <style:paragraph-properties fo:margin-left="0.5in" fo:margin-right="0in" fo:text-indent="0in" style:auto-text-indent="false" style:page-number="auto"/>
      <style:text-properties style:font-name="Supply" fo:font-weight="normal" officeooo:rsid="0038e444" style:font-weight-asian="normal" style:font-weight-complex="normal"/>
    </style:style>
    <style:style style:name="P161" style:family="paragraph" style:parent-style-name="Text_20_body">
      <style:paragraph-properties fo:margin-left="0.5in" fo:margin-right="0in" fo:text-indent="0in" style:auto-text-indent="false"/>
      <style:text-properties style:font-name="Supply" fo:font-weight="normal" officeooo:rsid="0038e444" officeooo:paragraph-rsid="003b7764" style:font-weight-asian="normal" style:font-weight-complex="normal"/>
    </style:style>
    <style:style style:name="P162" style:family="paragraph" style:parent-style-name="Text_20_body">
      <style:paragraph-properties fo:margin-left="0.5in" fo:margin-right="0in" fo:text-indent="0in" style:auto-text-indent="false"/>
      <style:text-properties style:font-name="Supply" fo:font-weight="normal" officeooo:rsid="0038e444" style:font-weight-asian="normal" style:font-weight-complex="normal"/>
    </style:style>
    <style:style style:name="T1" style:family="text">
      <style:text-properties style:font-name="Supply1"/>
    </style:style>
    <style:style style:name="T2" style:family="text">
      <style:text-properties style:font-name="Supply1" fo:font-size="22pt" fo:language="es" fo:country="AR" style:font-size-asian="22pt" style:font-size-complex="22pt"/>
    </style:style>
    <style:style style:name="T3" style:family="text">
      <style:text-properties style:font-name="Supply1" fo:font-size="12pt" fo:language="es" fo:country="AR" style:font-size-asian="12pt" style:font-size-complex="12pt"/>
    </style:style>
    <style:style style:name="T4" style:family="text">
      <style:text-properties style:font-name="Supply1" fo:font-size="12pt" fo:language="es" fo:country="AR" officeooo:rsid="0003f226" style:font-size-asian="12pt" style:font-size-complex="12pt"/>
    </style:style>
    <style:style style:name="T5" style:family="text">
      <style:text-properties style:text-underline-style="solid" style:text-underline-width="auto" style:text-underline-color="font-color"/>
    </style:style>
    <style:style style:name="T6" style:family="text">
      <style:text-properties officeooo:rsid="000545cd"/>
    </style:style>
    <style:style style:name="T7" style:family="text">
      <style:text-properties officeooo:rsid="0007fdc7"/>
    </style:style>
    <style:style style:name="T8" style:family="text">
      <style:text-properties officeooo:rsid="0009c3c5"/>
    </style:style>
    <style:style style:name="T9" style:family="text">
      <style:text-properties officeooo:rsid="000ad152"/>
    </style:style>
    <style:style style:name="T10" style:family="text">
      <style:text-properties officeooo:rsid="000b54ec"/>
    </style:style>
    <style:style style:name="T11" style:family="text">
      <style:text-properties officeooo:rsid="000c2b4e"/>
    </style:style>
    <style:style style:name="T12" style:family="text">
      <style:text-properties officeooo:rsid="00143e00"/>
    </style:style>
    <style:style style:name="T13" style:family="text">
      <style:text-properties officeooo:rsid="0016129c"/>
    </style:style>
    <style:style style:name="T14" style:family="text">
      <style:text-properties officeooo:rsid="0016cf7f"/>
    </style:style>
    <style:style style:name="T15" style:family="text">
      <style:text-properties officeooo:rsid="0018c496"/>
    </style:style>
    <style:style style:name="T16" style:family="text">
      <style:text-properties officeooo:rsid="00198ed8"/>
    </style:style>
    <style:style style:name="T17" style:family="text">
      <style:text-properties officeooo:rsid="001a6715"/>
    </style:style>
    <style:style style:name="T18" style:family="text">
      <style:text-properties officeooo:rsid="001b15b1"/>
    </style:style>
    <style:style style:name="T19" style:family="text">
      <style:text-properties officeooo:rsid="001cc856"/>
    </style:style>
    <style:style style:name="T20" style:family="text">
      <style:text-properties officeooo:rsid="001d9ddb"/>
    </style:style>
    <style:style style:name="T21" style:family="text">
      <style:text-properties officeooo:rsid="001f6717"/>
    </style:style>
    <style:style style:name="T22" style:family="text">
      <style:text-properties officeooo:rsid="00200854"/>
    </style:style>
    <style:style style:name="T23" style:family="text">
      <style:text-properties officeooo:rsid="0026f99f"/>
    </style:style>
    <style:style style:name="T24" style:family="text">
      <style:text-properties officeooo:rsid="00243808"/>
    </style:style>
    <style:style style:name="T25" style:family="text">
      <style:text-properties officeooo:rsid="00276973"/>
    </style:style>
    <style:style style:name="T26" style:family="text">
      <style:text-properties style:font-name="Supply" officeooo:rsid="00225d02"/>
    </style:style>
    <style:style style:name="T27" style:family="text">
      <style:text-properties style:font-name="Supply" officeooo:rsid="00276973"/>
    </style:style>
    <style:style style:name="T28" style:family="text">
      <style:text-properties officeooo:rsid="00278709"/>
    </style:style>
    <style:style style:name="T29" style:family="text">
      <style:text-properties officeooo:rsid="0028cad9"/>
    </style:style>
    <style:style style:name="T30" style:family="text">
      <style:text-properties officeooo:rsid="0028d690"/>
    </style:style>
    <style:style style:name="T31" style:family="text">
      <style:text-properties officeooo:rsid="002d2bb4"/>
    </style:style>
    <style:style style:name="T32" style:family="text">
      <style:text-properties officeooo:rsid="002ec4a8"/>
    </style:style>
    <style:style style:name="T33" style:family="text">
      <style:text-properties officeooo:rsid="002efb11"/>
    </style:style>
    <style:style style:name="T34" style:family="text">
      <style:text-properties officeooo:rsid="0030da53"/>
    </style:style>
    <style:style style:name="T35" style:family="text">
      <style:text-properties officeooo:rsid="00328428"/>
    </style:style>
    <style:style style:name="T36" style:family="text">
      <style:text-properties officeooo:rsid="00332df0"/>
    </style:style>
    <style:style style:name="T37" style:family="text">
      <style:text-properties officeooo:rsid="0034f64b"/>
    </style:style>
    <style:style style:name="T38" style:family="text">
      <style:text-properties officeooo:rsid="0035b78d"/>
    </style:style>
    <style:style style:name="T39" style:family="text">
      <style:text-properties officeooo:rsid="0036c45d"/>
    </style:style>
    <style:style style:name="T40" style:family="text">
      <style:text-properties fo:font-style="normal" style:font-style-asian="normal" style:font-style-complex="normal"/>
    </style:style>
    <style:style style:name="T41" style:family="text">
      <style:text-properties officeooo:rsid="0037c121"/>
    </style:style>
    <style:style style:name="T42" style:family="text">
      <style:text-properties officeooo:rsid="0038e444"/>
    </style:style>
    <style:style style:name="T43" style:family="text">
      <style:text-properties officeooo:rsid="003a1a0a"/>
    </style:style>
    <style:style style:name="T44" style:family="text">
      <style:text-properties fo:font-weight="bold"/>
    </style:style>
    <style:style style:name="T45" style:family="text">
      <style:text-properties officeooo:rsid="003b7764"/>
    </style:style>
    <style:style style:name="T46" style:family="text">
      <style:text-properties fo:font-style="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118in" fo:text-indent="-0.25in" fo:margin-left="1.3118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618in" fo:text-indent="-0.25in" fo:margin-left="2.0618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3118in" fo:text-indent="-0.25in" fo:margin-left="2.3118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618in" fo:text-indent="-0.25in" fo:margin-left="2.5618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8118in" fo:text-indent="-0.25in" fo:margin-left="2.8118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618in" fo:text-indent="-0.25in" fo:margin-left="3.0618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3118in" fo:text-indent="-0.25in" fo:margin-left="3.3118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618in" fo:text-indent="-0.25in" fo:margin-left="3.5618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Paradigmas de Programación</text:span></text:p>
      <text:p text:style-name="P1" loext:marker-style-name="T1"><text:span text:style-name="T3">T.P. N°</text:span><text:span text:style-name="T4">3</text:span><text:span text:style-name="T3"> – Ambrosini <text:s/></text:span></text:p>
      <text:p text:style-name="P1" loext:marker-style-name="T1"><text:span text:style-name="T3">Fecha de inicio: </text:span><text:span text:style-name="T4">24</text:span><text:span text:style-name="T3">/</text:span><text:span text:style-name="T4">4</text:span><text:span text:style-name="T3">/26</text:span></text:p>
      <text:p text:style-name="P2" loext:marker-style-name="T3"/>
      <text:p text:style-name="P3" loext:marker-style-name="T1">Ejercicio 1.1:</text:p>
      <text:p text:style-name="P4" loext:marker-style-name="T1"/>
      <table:table table:name="Paradigmas" table:style-name="Paradigmas" table:template-name="AcNF">
        <table:table-column table:style-name="Paradigmas.A"/>
        <table:table-column table:style-name="Paradigmas.B"/>
        <table:table-column table:style-name="Paradigmas.C"/>
        <table:table-row>
          <table:table-cell table:style-name="Paradigmas.A1" office:value-type="string">
            <text:p text:style-name="P5">Paradigma</text:p>
          </table:table-cell>
          <table:table-cell table:style-name="Paradigmas.A1" office:value-type="string">
            <text:p text:style-name="P6">Dominio</text:p>
          </table:table-cell>
          <table:table-cell table:style-name="Paradigmas.A1" office:value-type="string">
            <text:p text:style-name="P6">Lenguajes Representativos</text:p>
          </table:table-cell>
        </table:table-row>
        <table:table-row table:style-name="Paradigmas.2">
          <table:table-cell table:style-name="Paradigmas.A2" office:value-type="string">
            <text:p text:style-name="P7">Lógico</text:p>
          </table:table-cell>
          <table:table-cell table:style-name="Paradigmas.B2" office:value-type="string">
            <text:list text:style-name="L1">
              <text:list-item>
                <text:p text:style-name="P8"><text:span text:style-name="T5">Sistemas expertos y tomas de decisiones:</text:span> Es el uso más famoso. Se utiliza para crear programas que imiten el razonamiento humano experto en un área específica.</text:p>
              </text:list-item>
              <text:list-item>
                <text:p text:style-name="P8"><text:span text:style-name="T5">Inteligencia artificial simbólica y procesamiento de lenguaje natural (PNL)</text:span>: Antes del auge de los LLM, la IA se basaba casi totalmente en lógica. Se encargaba de cosas como el análisis sintáctico de oraciones, traducción basada en reglas gramaticales y resolución de acertijos lógicos</text:p>
              </text:list-item>
              <text:list-item>
                <text:p text:style-name="P8"><text:span text:style-name="T5">Bases de datos deductivas</text:span>: <text:span text:style-name="T6">A diferencia de SQL (que es declarativo), el paradigma lógico permite realizar consultas que permiten recursividad compleja o deducciones que no están grabadas explícitamente en las tablas</text:span></text:p>
              </text:list-item>
              <text:list-item>
                <text:p text:style-name="P8">Verificación de hardware y software (métodos formales): <text:span text:style-name="T6">Se usa para demostrar matemáticamente que un sistema des seguro o que un chip no tiene errores de diseño antes de fabricarlo. Es importante en sistemas críticos donde un error cuesta vidas o millones de dólares.</text:span></text:p>
              </text:list-item>
              <text:list-item>
                <text:p text:style-name="P8">Resolución de problemas de combinatoria y restricciones: <text:span text:style-name="T6">Problemas donde tenés miles de variables y reglas y todas deben cumplirse simultáneamente.</text:span></text:p>
              </text:list-item>
            </text:list>
          </table:table-cell>
          <table:table-cell table:style-name="Paradigmas.A2" office:value-type="string">
            <text:p text:style-name="P9">Prolog</text:p>
          </table:table-cell>
        </table:table-row>
        <table:table-row>
          <table:table-cell table:style-name="Paradigmas.A2" office:value-type="string">
            <text:p text:style-name="P9">Funcional</text:p>
          </table:table-cell>
          <table:table-cell table:style-name="Paradigmas.B3" office:value-type="string">
            <text:list text:style-name="L2">
              <text:list-item>
                <text:p text:style-name="P10">Procesamiento de Big Data y cómputo en paralelo: Este es su dominio más fuerte. Como en el paradigma funcional los datos son inmutables, es decir, no es necesario preocuparse de que dos procesadores intenten cambiar la misma variable al mismo tiempo. Por ejemplo, Apache Spark utiliza Scala para procesar <text:soft-page-break/>datos masivos.</text:p>
              </text:list-item>
              <text:list-item>
                <text:p text:style-name="P11">Sistemas financieros y de alta seguridad: En la banca, un error de “estado” (una variable que cambió cuando no debería haberlo hecho) puede significar millones en pérdidas. El paradigma funcional es más fácil de probar matemáticamente para asegurar que no hay errores.</text:p>
              </text:list-item>
              <text:list-item>
                <text:p text:style-name="P11">Motores de telecomunicaciones y mensajería: Los sistemas tienen que estar operativos 24/7 y manejar millones de mensajes sin que el sistema se caiga (whatsapp fue construido originalmente con Erlang). Esto es especialmente bueno para los lenguajes funcionales debido a la ausencia de locks (inmutabilidad).</text:p>
              </text:list-item>
              <text:list-item>
                <text:p text:style-name="P11">Inteligencia Artificial y computación simbólica: Al igual que el paradigma lógico, el funcional permite manejar estructuras de datos complejas (árboles o listas) de forma natural con recursividad.</text:p>
              </text:list-item>
            </text:list>
          </table:table-cell>
          <table:table-cell table:style-name="Paradigmas.A2" office:value-type="string">
            <text:p text:style-name="P12">Prolog, Lisp, Erlang, F#</text:p>
          </table:table-cell>
        </table:table-row>
        <table:table-row>
          <table:table-cell table:style-name="Paradigmas.A2" office:value-type="string">
            <text:p text:style-name="P12">Imperativo Procedural</text:p>
          </table:table-cell>
          <table:table-cell table:style-name="Paradigmas.B4" office:value-type="string">
            <text:list text:style-name="L3">
              <text:list-item>
                <text:p text:style-name="P13">Programación de sistemas y bajo nivel: Principal área de ejecución. Es muy eficiente a la hora de controlar hardware de forma directa. Se usa en sistemas operativos como Windows o el kernel de Linux, drivers de video, o sistemas de frenados de autos.</text:p>
              </text:list-item>
              <text:list-item>
                <text:p text:style-name="P13">Cómputo científico o de alto rendimiento (HCP): Para cálculos matemáticos masivos (clima o simulaciones de física nuclear), se necesitan lenguajes que no tengan la “carga” de objetos o la recursividad lenta. En estos casos se suele usar MATLAB. </text:p>
              </text:list-item>
              <text:list-item>
                <text:p text:style-name="P13">Sistemas embebidos y microcontroladores: <text:span text:style-name="T7">Los chips que vienen integrados en sistemas simples (como un lavarropas o un microondas) tienen muy pocos recursos, por lo que usar paradigmas “pesados” resulta muy complejo.</text:span></text:p>
              </text:list-item>
              <text:list-item>
                <text:p text:style-name="P14">Scripts de automatización de tareas: Para tareas rápidas de administración de servidores donde sólo se necesita que se se ejecuten una serie de pasos lógicos.</text:p>
              </text:list-item>
            </text:list>
          </table:table-cell>
          <table:table-cell table:style-name="Paradigmas.A2" office:value-type="string">
            <text:p text:style-name="P15">C, Pascal, Python (de forma simple)</text:p>
          </table:table-cell>
        </table:table-row>
        <text:soft-page-break/>
        <table:table-row table:style-name="Paradigmas.2">
          <table:table-cell table:style-name="Paradigmas.A2" office:value-type="string">
            <text:p text:style-name="P15">Programación orientada a objetos (POO)</text:p>
          </table:table-cell>
          <table:table-cell table:style-name="Paradigmas.B5" office:value-type="string">
            <text:list text:style-name="L4">
              <text:list-item>
                <text:p text:style-name="P16">Aplicaciones Empresariales y backend: Sistemas bancarios, plataformas de e-commerce y CRM’s. Son sistemas de miles de reglas que necesitan estar organizadas.</text:p>
              </text:list-item>
              <text:list-item>
                <text:p text:style-name="P16">Desarrollo de videojuegos: Cada “enemigo”, “bala” o “personaje” puede ser considerado un objeto con sus respectivos métodos y atributos.</text:p>
              </text:list-item>
              <text:list-item>
                <text:p text:style-name="P16">Sistemas modernos (interfaces): Aunque su núcleo suele ser procedural (C), las capas superiores y las ventanas suelen ser gestionadas como objetos.</text:p>
              </text:list-item>
              <text:list-item>
                <text:p text:style-name="P16">Desarrollo de aplicaciones mobile: Tanto en Android como en iOS se basan totalmente en objetos.</text:p>
                <text:p text:style-name="P16"/>
              </text:list-item>
            </text:list>
            <text:p text:style-name="P15">Sus 4 pilares son: <text:line-break/></text:p>
            <text:list text:style-name="L5">
              <text:list-item>
                <text:p text:style-name="P17">Abstracción</text:p>
              </text:list-item>
              <text:list-item>
                <text:p text:style-name="P18">Encapsulamiento</text:p>
              </text:list-item>
              <text:list-item>
                <text:p text:style-name="P19">Herencia</text:p>
              </text:list-item>
              <text:list-item>
                <text:p text:style-name="P18"><text:span text:style-name="T8">Polimorfismo</text:span> </text:p>
              </text:list-item>
            </text:list>
          </table:table-cell>
          <table:table-cell table:style-name="Paradigmas.A2" office:value-type="string">
            <text:p text:style-name="P20">Java, C++,C#, Python</text:p>
          </table:table-cell>
        </table:table-row>
      </table:table>
      <text:p text:style-name="P21" loext:marker-style-name="T1"/>
      <text:p text:style-name="P22" loext:marker-style-name="T1"/>
      <text:p text:style-name="P23" loext:marker-style-name="T1">Ejercicio 1.<text:span text:style-name="T8">2</text:span>:</text:p>
      <text:p text:style-name="P23" loext:marker-style-name="T1"/>
      <text:p text:style-name="P24" loext:marker-style-name="T1"><text:tab/>Ni bien el concepto de abstracción es un pilar fundamental de la POO, esto no implica que otros paradigmas lo puedan implementar. Claramente, estos paradigmas no van a implementar la abstracción de la misma forma que POO (clases, objetos, interfaces, etc...), sin embargo tienen sus <text:span text:style-name="T9">maneras</text:span>.</text:p>
      <text:p text:style-name="P24" loext:marker-style-name="T1"><text:tab/>Aún teniendo esto en cuenta, la gran muralla que nos encontramos con los lenguajes puramente procedimentales es su bajo nivel de abstracción. Los procedimientos se generan de forma secuencial y, más allá de algunas estructuras que controlan el flujo del programa <text:span text:style-name="T9">y aportan una capa de flexibilidad</text:span>, no dan mucho lugar a <text:span text:style-name="T9">grandes unidades de abstracción que permitan representar el mundo de forma eficiente o modelar problemas matemáticos con facilidad (no tienen Tipos de Dato Abstracto o TDA).</text:span></text:p>
      <text:p text:style-name="P25" loext:marker-style-name="T1"/>
      <text:p text:style-name="P25" loext:marker-style-name="T1"/>
      <text:p text:style-name="P26" loext:marker-style-name="T1">Ejercicio 1.<text:span text:style-name="T9">3</text:span>:</text:p>
      <text:p text:style-name="P26" loext:marker-style-name="T1"/>
      <text:p text:style-name="P27" loext:marker-style-name="T1"><text:tab/><text:span text:style-name="T9">Retomando la respuesta anterior, los lenguajes declarativos tienen un nivel de abstracción altísimo, pero muy distinto a la POO, esto se debe a que, desde su concepción </text:span><text:span text:style-name="T10">y en esencia</text:span><text:span text:style-name="T9"> “no les importa” cómo está hecha una computadora o cómo funciona, y a que su enfoque de abstracción no está en como modelar los datos </text:span><text:span text:style-name="T10">(como POO)</text:span><text:span text:style-name="T9">, sino en conceptos con una base teórica muy fuerte. Su foco principal es </text:span><text:span text:style-name="T10">que el programador se centre en “que” quiere hacer y no “como” hacerlo.</text:span></text:p>
      <text:p text:style-name="P27" loext:marker-style-name="T1"><text:soft-page-break/><text:tab/><text:span text:style-name="T10">Teniendo esto en cuenta, tiene mucho sentido que las ramas que más explotan las virtudes de este paradigma sean la lógica y la matemática (el paradigma lógico o el funcional, respectivamente). El paradigma se esfuerza en parecerse a estos conceptos desde su base teórica dejando de lado la estructura imperativa y secuencial propias de la naturaleza de una computadora. Realmente, todo termina siendo transformado a un formato que la computadora entienda, pero esta capa de abstracción que permite que los conceptos estén más cerca de sus contrapartes teóricas es lo que hace que estos lenguajes sean tan poderosos en sus áreas de aplicación.</text:span></text:p>
      <text:p text:style-name="P28" loext:marker-style-name="T1"/>
      <text:p text:style-name="P29" loext:marker-style-name="T1"/>
      <text:p text:style-name="P29" loext:marker-style-name="T1">Ejercicio 1.<text:span text:style-name="T10">4</text:span>:</text:p>
      <text:p text:style-name="P29" loext:marker-style-name="T1"/>
      <text:p text:style-name="P27" loext:marker-style-name="T1"><text:tab/><text:span text:style-name="T10">VERDADERO</text:span></text:p>
      <text:p text:style-name="P30" loext:marker-style-name="T1"/>
      <text:p text:style-name="P27" loext:marker-style-name="T1"><text:tab/><text:span text:style-name="T10">Esta afirmación está en lo correcto. La razón es simple, tomemos a SQL (un lenguaje declarativo) como ejemplo: si yo realizo una consulta a una base de datos y utilizo un “JOIN” yo no sé realmente que es lo que el lenguaje está haciendo por detrás, no tengo control sobre estos algoritmos. Lejos de ser esto una desventaja es una inmensa facilidad que me brinda el paradigma para poder concentrarme yo, como programador en que quiero hacer y </text:span><text:span text:style-name="T11">delegarle la lógica de ejecución</text:span><text:span text:style-name="T10"> al compilador o al intérprete. </text:span><text:span text:style-name="T11">Demás está decir que esta postura me restringe en el sentido de que me quita libertades y me quita control sobre mi software ya que es el sistema el que decide por mí cómo hacer el trabajo.</text:span></text:p>
      <text:p text:style-name="P28" loext:marker-style-name="T1"><text:tab/></text:p>
      <text:p text:style-name="P29" loext:marker-style-name="T1"/>
      <text:p text:style-name="P31" loext:marker-style-name="T1">Ejercicio 1.<text:span text:style-name="T11">5</text:span>:</text:p>
      <text:p text:style-name="P31" loext:marker-style-name="T1"/>
      <text:p text:style-name="P32" loext:marker-style-name="T1"><text:tab/><text:span text:style-name="T11">VERDADERO</text:span></text:p>
      <text:p text:style-name="P33" loext:marker-style-name="T1"/>
      <text:p text:style-name="P32" loext:marker-style-name="T1"><text:tab/><text:span text:style-name="T11">Esta respuesta está ampliamente respaldada por la anterior, pero esa misma es la esencia de los lenguajes declarativos como Prolog o Haskell, la idea es confiar en que el la lógica algorítmica o el control de flujo se haga de forma eficiente y confiable por el sistema que se esté utilizando. Volviendo al ejemplo de SQL, el propio lenguaje es el que se encarga de toda la lógica que hay atrás de un SELECT o de un JOIN.</text:span></text:p>
      <text:p text:style-name="P33" loext:marker-style-name="T1"/>
      <text:p text:style-name="P33" loext:marker-style-name="T1"/>
      <text:p text:style-name="P34">Ejercicio 1.6:</text:p>
      <text:p text:style-name="P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5">Lenguaje</text:p>
          </table:table-cell>
          <table:table-cell table:style-name="Table1.A1" office:value-type="string">
            <text:p text:style-name="P35">Abstracción</text:p>
          </table:table-cell>
          <table:table-cell table:style-name="Table1.A1" office:value-type="string">
            <text:p text:style-name="P35">Encapsulamiento</text:p>
          </table:table-cell>
          <table:table-cell table:style-name="Table1.A1" office:value-type="string">
            <text:p text:style-name="P35">Herencia</text:p>
          </table:table-cell>
          <table:table-cell table:style-name="Table1.A1" office:value-type="string">
            <text:p text:style-name="P35">Polimorfismo</text:p>
          </table:table-cell>
        </table:table-row>
        <table:table-row>
          <table:table-cell table:style-name="Table1.A1" office:value-type="string">
            <text:p text:style-name="P35">C++</text:p>
          </table:table-cell>
          <table:table-cell table:style-name="Table1.A1" office:value-type="string">
            <text:p text:style-name="P35">Clases y clases abstractas puras (con funciones = <text:soft-page-break/>0)</text:p>
          </table:table-cell>
          <table:table-cell table:style-name="Table1.A1" office:value-type="string">
            <text:p text:style-name="P35">Manual (modificadores) public, private, protected)</text:p>
          </table:table-cell>
          <table:table-cell table:style-name="Table1.A1" office:value-type="string">
            <text:p text:style-name="P35">Múltiple, una clase puede heredar de varias</text:p>
          </table:table-cell>
          <table:table-cell table:style-name="Table1.A1" office:value-type="string">
            <text:p text:style-name="P35">Estático (sobrecarga) y dinámico (funciones virtual). <text:soft-page-break/>Templates</text:p>
          </table:table-cell>
        </table:table-row>
        <table:table-row>
          <table:table-cell table:style-name="Table1.A1" office:value-type="string">
            <text:p text:style-name="P35">C#</text:p>
          </table:table-cell>
          <table:table-cell table:style-name="Table1.A1" office:value-type="string">
            <text:p text:style-name="P35">Clases, interfaces y clases abstract</text:p>
          </table:table-cell>
          <table:table-cell table:style-name="Table1.A1" office:value-type="string">
            <text:p text:style-name="P35">Modificadores (public, private, etc.) y propiedades (get/set)</text:p>
          </table:table-cell>
          <table:table-cell table:style-name="Table1.A1" office:value-type="string">
            <text:p text:style-name="P35">Simple de clases, múltiple de interfaces</text:p>
          </table:table-cell>
          <table:table-cell table:style-name="Table1.A1" office:value-type="string">
            <text:p text:style-name="P36">Dinámico mediante palabras clave virtual y override</text:p>
          </table:table-cell>
        </table:table-row>
        <table:table-row>
          <table:table-cell table:style-name="Table1.A1" office:value-type="string">
            <text:p text:style-name="P35">Java</text:p>
          </table:table-cell>
          <table:table-cell table:style-name="Table1.A1" office:value-type="string">
            <text:p text:style-name="P35">Clases, interfaces y clases abstract</text:p>
          </table:table-cell>
          <table:table-cell table:style-name="Table1.A1" office:value-type="string">
            <text:p text:style-name="P35">Modificadores de acceso. Muy estricto con la ocultación de datos</text:p>
          </table:table-cell>
          <table:table-cell table:style-name="Table1.A1" office:value-type="string">
            <text:p text:style-name="P35">Simple de clases, múltiple de interfaces</text:p>
          </table:table-cell>
          <table:table-cell table:style-name="Table1.A1" office:value-type="string">
            <text:p text:style-name="P37">Dinámico por defecto (todos los métodos no finales son virtuales)</text:p>
          </table:table-cell>
        </table:table-row>
        <table:table-row>
          <table:table-cell table:style-name="Table1.A1" office:value-type="string">
            <text:p text:style-name="P36">Java Script</text:p>
          </table:table-cell>
          <table:table-cell table:style-name="Table1.A1" office:value-type="string">
            <text:p text:style-name="P36">Prototipos (antes de ES6) y clases (sugar sintax)</text:p>
          </table:table-cell>
          <table:table-cell table:style-name="Table1.A1" office:value-type="string">
            <text:p text:style-name="P38">Débil (históricamente con _, ahora con # para campos privados)</text:p>
          </table:table-cell>
          <table:table-cell table:style-name="Table1.A1" office:value-type="string">
            <text:p text:style-name="P38">Prototípica (un objeto hereda de otro). Simple</text:p>
          </table:table-cell>
          <table:table-cell table:style-name="Table1.A1" office:value-type="string">
            <text:p text:style-name="P38">Duck typing (si camina como pato y suena como pato, es un pato). Muy flexible</text:p>
          </table:table-cell>
        </table:table-row>
        <table:table-row>
          <table:table-cell table:style-name="Table1.A1" office:value-type="string">
            <text:p text:style-name="P38">Python</text:p>
          </table:table-cell>
          <table:table-cell table:style-name="Table1.A1" office:value-type="string">
            <text:p text:style-name="P38">Clases y Clases abstractas (módulo abc)</text:p>
          </table:table-cell>
          <table:table-cell table:style-name="Table1.A1" office:value-type="string">
            <text:p text:style-name="P38">Basado en convenciones (_ o __₎ y decoradores @property</text:p>
          </table:table-cell>
          <table:table-cell table:style-name="Table1.A1" office:value-type="string">
            <text:p text:style-name="P38">Múltiple. Utiliza algoritmo MRO para resolver conflictos</text:p>
          </table:table-cell>
          <table:table-cell table:style-name="Table1.A1" office:value-type="string">
            <text:p text:style-name="P38">Duck typing. No requiere interfaces formales para el polimorfismo</text:p>
          </table:table-cell>
        </table:table-row>
      </table:table>
      <text:p text:style-name="P34"/>
      <text:p text:style-name="P39" loext:marker-style-name="T1"/>
      <text:p text:style-name="P40">Ejercicio 1.<text:span text:style-name="T12">7</text:span>:</text:p>
      <text:p text:style-name="P40"/>
      <text:p text:style-name="P41"><text:tab/>RESPUESTA C</text:p>
      <text:p text:style-name="P42"/>
      <text:p text:style-name="P42"/>
      <text:p text:style-name="P43">Ejercicio 1.<text:span text:style-name="T13">8</text:span>:</text:p>
      <text:p text:style-name="P43"/>
      <text:p text:style-name="P44"><text:tab/><text:span text:style-name="T13">VERDADERO</text:span></text:p>
      <text:p text:style-name="P45"><text:tab/></text:p>
      <text:p text:style-name="P46"><text:tab/>La herencia múltiple da lugar al famoso problema del diamante (cuando una clase hereda de 2 clases distintas y hay superposición de métodos), el cual no es fácil de resolver <text:span text:style-name="T14">y puede generar ambigüedades</text:span>. Ni bien hay lenguajes que l<text:span text:style-name="T14">o permiten (como los mencionados anteriormente) hay lenguajes que deciden esquivarlo y brindar soluciones alternativas (como Java con las interfaces).</text:span></text:p>
      <text:p text:style-name="P47"/>
      <text:p text:style-name="P48">Ejercicio 1.<text:span text:style-name="T14">9</text:span>:</text:p>
      <text:p text:style-name="P48"><text:soft-page-break/></text:p>
      <text:list text:style-name="L6">
        <text:list-item>
          <text:p text:style-name="P49">Palabra 1: Compilación</text:p>
        </text:list-item>
        <text:list-item>
          <text:p text:style-name="P49">Palabra 2: Interpretado</text:p>
        </text:list-item>
        <text:list-item>
          <text:p text:style-name="P49">Palabra 3: Híbrida</text:p>
        </text:list-item>
      </text:list>
      <text:p text:style-name="P50"/>
      <text:p text:style-name="P50"/>
      <text:p text:style-name="P51">Ejercicio 1.<text:span text:style-name="T15">10</text:span>:</text:p>
      <text:p text:style-name="P51"/>
      <text:list text:style-name="L7">
        <text:list-item>
          <text:p text:style-name="P52">Compilación: El código se traduce todo de una vez antes de ejecutarse. El resultado es un archivo binario independiente (un .exe en Windows o un binario en Linux). <text:line-break/></text:p>
          <text:list>
            <text:list-item>
              <text:p text:style-name="P52">Ventajas: </text:p>
              <text:list>
                <text:list-item>
                  <text:p text:style-name="P52">Velocidad: Es mucho más rápido, ya que el procesador lo lee directamente</text:p>
                </text:list-item>
                <text:list-item>
                  <text:p text:style-name="P52">Optimización: El compilador analiza todo el programa para hacerlo más eficiente.</text:p>
                </text:list-item>
                <text:list-item>
                  <text:p text:style-name="P52">Seguridad: El código fuente no se distribuye, solo el binario (que es ilegible)</text:p>
                  <text:p text:style-name="P52"/>
                </text:list-item>
              </text:list>
            </text:list-item>
            <text:list-item>
              <text:p text:style-name="P52">Desventajas: </text:p>
              <text:list>
                <text:list-item>
                  <text:p text:style-name="P52">Lento desarrollo: Cada cambio en el software requiere repetir todo el proceso de compilación.</text:p>
                </text:list-item>
                <text:list-item>
                  <text:p text:style-name="P52">Dependencia de plataforma: Un binario diseñado para Windows no va funcionar para otros sistemas operativos como MacOS o Linux</text:p>
                </text:list-item>
                <text:list-item>
                  <text:p text:style-name="P52">Depuración difícil: Los errores suelen verse al final del código</text:p>
                  <text:p text:style-name="P52"/>
                </text:list-item>
              </text:list>
            </text:list-item>
          </text:list>
        </text:list-item>
        <text:list-item>
          <text:p text:style-name="P52">Interpretado: El programa se traduce línea por línea en tiempo de ejecución mediante un programa llamado “intérprete”.</text:p>
          <text:p text:style-name="P52"/>
          <text:list>
            <text:list-item>
              <text:p text:style-name="P52">Ventajas:</text:p>
              <text:list>
                <text:list-item>
                  <text:p text:style-name="P52">Flexibilidad: Se pueden probar cambios en el momento (lo que lo hace especialmente bueno para scripting)</text:p>
                </text:list-item>
                <text:list-item>
                  <text:p text:style-name="P52">Multiplataforma: Al no tener un ejecutable compilado, no hay necesidad de restringirse a solo una plataforma, simplemente se instala el intérprete y él hace el trabajo</text:p>
                </text:list-item>
                <text:list-item>
                  <text:p text:style-name="P52">Depuración fácil: De haber un error, el programa se detendrá exactamente en la línea que lo produjo </text:p>
                  <text:p text:style-name="P52"/>
                </text:list-item>
              </text:list>
            </text:list-item>
            <text:list-item>
              <text:p text:style-name="P52">Desventajas:</text:p>
              <text:list>
                <text:list-item>
                  <text:p text:style-name="P52">Lentitud: Traducir mientras se ejecuta consume muchos recursos.</text:p>
                </text:list-item>
                <text:list-item>
                  <text:p text:style-name="P52">Exposición: Se necesita el código fuente para que funcione</text:p>
                </text:list-item>
                <text:list-item>
                  <text:p text:style-name="P52">Dependencia: Se necesita tener siempre instalado el intérprete.</text:p>
                </text:list-item>
              </text:list>
            </text:list-item>
          </text:list>
        </text:list-item>
      </text:list>
      <text:p text:style-name="P53"><text:soft-page-break/></text:p>
      <text:p text:style-name="P53"/>
      <text:list text:continue-numbering="true" text:style-name="L7">
        <text:list-item>
          <text:p text:style-name="P52">Sistemas híbridos: Es una combinación de ambos modelos, se compila un pre-código algo más simple que el código máquina (bytecode) y luego es interpretado al vuelo por una máquina virtual.</text:p>
          <text:p text:style-name="P52"/>
          <text:list>
            <text:list-item>
              <text:p text:style-name="P52">Ventajas: </text:p>
              <text:list>
                <text:list-item>
                  <text:p text:style-name="P52">Portabilidad total: Como dice el slogan de Java: “Write once, run anywhere”</text:p>
                </text:list-item>
                <text:list-item>
                  <text:p text:style-name="P52">JIT (Just In Time): Se compila a binario solamente las partes que se usan.</text:p>
                  <text:p text:style-name="P52"/>
                </text:list-item>
              </text:list>
            </text:list-item>
            <text:list-item>
              <text:p text:style-name="P52">Desventajas: </text:p>
              <text:list>
                <text:list-item>
                  <text:p text:style-name="P52">Consumo de memoria: Para correr un programa, por más simple que sea, hay que arrancar toda la máquina virtual.</text:p>
                </text:list-item>
                <text:list-item>
                  <text:p text:style-name="P52">Arranque inicial: Puede ser más lento que un binario puro al comenzar (por razones similares a la desventaja que está arriba)</text:p>
                  <text:p text:style-name="P52"/>
                </text:list-item>
              </text:list>
            </text:list-item>
          </text:list>
        </text:list-item>
        <text:list-item>
          <text:p text:style-name="P52">Similitudes y diferencias: </text:p>
          <text:p text:style-name="P52"/>
          <text:list>
            <text:list-item>
              <text:p text:style-name="P52">Similitudes:</text:p>
              <text:list>
                <text:list-item>
                  <text:p text:style-name="P52">Todos tienen el mismo objetivo, pasar del ámbito de la abstracción humana a la rigidez del lenguaje máquina</text:p>
                </text:list-item>
                <text:list-item>
                  <text:p text:style-name="P52">Todos pasan por las fases: Análisis léxico, análisis sintáctico y análisis semántico del código.</text:p>
                  <text:p text:style-name="P52"/>
                </text:list-item>
              </text:list>
            </text:list-item>
            <text:list-item>
              <text:p text:style-name="P52">Diferencias:</text:p>
              <text:list>
                <text:list-item>
                  <text:p text:style-name="P52">Momento de la traducción: El compilador lo hace antes de la ejecución, mientras que el intérprete lo hace durante. El híbrido hace parte del trabajo antes y parte durante</text:p>
                </text:list-item>
                <text:list-item>
                  <text:p text:style-name="P52">Eficiencia: La compilación siempre ganará en términos de velocidad de rendimiento, mientras que los lenguajes interpretados tienen tiempos de desarrollo más cortos</text:p>
                </text:list-item>
              </text:list>
            </text:list-item>
          </text:list>
        </text:list-item>
      </text:list>
      <text:p text:style-name="P53"/>
      <text:p text:style-name="P53"/>
      <text:p text:style-name="P54">Ejercicio 1.1<text:span text:style-name="T16">3 (Se omite el ejercicio 1.11 y 1.12 por ambigüedad)</text:span>:</text:p>
      <text:p text:style-name="P54"/>
      <text:p text:style-name="P55"><text:tab/><text:span text:style-name="T16">La información se trasmite mediante una cadena de transformaciones y verificaciones. Cada fase recibe una representación del código de la etapa anterior, la procesa y genera una nueva representación (generalmente, más cercana al lenguaje máquina) que sirve de entrada para la siguiente. Además, todas las fases se comunican de forma transversal mediante la tabla de símbolos.</text:span></text:p>
      <text:p text:style-name="P56"><text:tab/></text:p>
      <text:p text:style-name="P57"><text:soft-page-break/><text:tab/>La primera fase en el proceso de compilación es el análisis léxico (scanner). Su fin es leer el flujo de caracteres del código fuente y agruparlos en unidades con significado propio llamadas <text:span text:style-name="T17">tokens</text:span> (son del tipo &lt;<text:span text:style-name="T17">nombre, valor</text:span>&gt;). <text:span text:style-name="T17">Cuando el scanner encuentra un identificador, lo inserta en la tabla de símbolos. En este punto, la tabla es flaca, solo se sabe que existe un nombre, pero a veces no se sabe que es.</text:span></text:p>
      <text:p text:style-name="P58"/>
      <text:p text:style-name="P57"><text:tab/><text:span text:style-name="T17">Luego viene la etapa de análisis sintáctico o parser. Recibe los tokens y verifica que sigan las reglas gramaticales del lenguaje. Su objetivo es construir una estructura jerárquica, para lograr esto, generalmente se ayudan de estructuras como un Abstract Syntax Tree (AST). Es en este punto en el que la tabla ya empieza a ganar cuerpo. El parser reconoce el contexto. Si ve “float temperatura”, le dice a la tabla: “Ese nombre ‘temperatura’ que guardó el scanner, es una variable y su tipo es float”.</text:span></text:p>
      <text:p text:style-name="P59"/>
      <text:p text:style-name="P59"><text:tab/><text:span text:style-name="T18">Pasamos ahora al análisis semántico. Aquí se revisa que el árbol tenga sentido lógico. Su principal fin es la comprobación de tipos (que no se intente sumar un string con un int) y asegurar que variables hayan sido declaradas antes de usarse (vale aclarar que la inferencia de tipos se realiza durante este proceso). En este punto, la tabla de de símbolos cumple un rol de proveedor de información, ya no se le insertan tantos valores sino que se usa para validar las operaciones y los datos.</text:span></text:p>
      <text:p text:style-name="P59"/>
      <text:p text:style-name="P59"><text:tab/><text:span text:style-name="T18">Ahora se crea un código intermedio. Se crea una representación del programa que está a medio camino entre ser código fuente y código máquina (Three-Address Code). Su principal fin es facilitar la optimización del código. La principal función de la tabla en este momento es facilitar la simplificación de expresiones complejas.</text:span></text:p>
      <text:p text:style-name="P59"/>
      <text:p text:style-name="P60"><text:tab/><text:span text:style-name="T18">Como uno de los pasos finales, se busca la optimización del código. Se busca mejorar el código intermedio para que sea más eficiente u ocupe menos memoria evitando redundancias y cálculos innecesarios, para esto la tabla es especialmente útil ya que ayuda a identificar fácilmente las redundancias </text:span><text:span text:style-name="T19">(con la propagación de constantes por ejemplo)</text:span><text:span text:style-name="T18">.</text:span></text:p>
      <text:p text:style-name="P59"/>
      <text:p text:style-name="P59"><text:tab/><text:span text:style-name="T18">Finalmente, tenemos la última fase, la generación del código objeto. Es la fase donde se traduce el código optimizado al lenguaje de máquina (bianrio) específico para </text:span><text:span text:style-name="T19">la arquitectura</text:span><text:span text:style-name="T18"> que se esté usando en ese momento (</text:span><text:span text:style-name="T19">x86, ARM</text:span><text:span text:style-name="T18">, etc...). </text:span><text:span text:style-name="T19">En este momento es cuando la tabla de símbolos es importante, ya que permite traducir nombres a direcciones de memoria.</text:span></text:p>
      <text:p text:style-name="P61"><text:soft-page-break/></text:p>
      <text:p text:style-name="P62">Ejercicio 1.1<text:span text:style-name="T20">5 (1.14 omitida por falta de tiempo):</text:span></text:p>
      <text:p text:style-name="P62"/>
      <text:p text:style-name="P63"><text:tab/>La tabla de símbolos tiene distintas utilidades a lo largo de todo el proceso de compilación. Podríamos separar su ciclo de vida en 2 partes, una de creación y otra de verificación. En las primeras etapas de la compilación la tabla se forma y obtiene información del código fuente. En el análisis léxico comenzamos a formar una tabla “flaca”, el scanner va leyendo los símbolos, transformándolos en tokens e insertándolos en la tabla, sin importarle mucho que son o qué significa, nos quedamos con los nombres.</text:p>
      <text:p text:style-name="P64"><text:tab/>Luego, pasamos al análisis sintáctico, en este punto se empiezan a hacer asociaciones entre los nombres que teníamos previamente y los tipos que poseen y el scope que manejan, empezamos a darle significado a los tokens arrojados durante la fase anterior.</text:p>
      <text:p text:style-name="P64"><text:tab/><text:span text:style-name="T21">A partir de aquí, ya se le puede empezar a atribuir un rol de verificador a la tabla, ya debería tener suficiente información para ayudarnos a verificar la coherencia de las operaciones que deseemos realizar. Ya en el análisis semántico, el sistema usa la tabla para verificar que las operaciones presentes en el AST tengan sentido, muy pocas modificaciones se presentan en este punto en la tabla.</text:span></text:p>
      <text:p text:style-name="P64"><text:tab/><text:span text:style-name="T21">Pasamos a la generación de código intermedio, éste código va a usarse para realizar optimizaciones en el mismo y así facilitar el proceso de compilación final. En este punto, la tabla es una herramienta genial que permite facilitar esta mejora dentro del código simplificando estructuras complejas presentes en el código fuente.</text:span></text:p>
      <text:p text:style-name="P64"><text:tab/><text:span text:style-name="T21">Una vez tenemos este código intermedio pasamos a la fase de optimización. Aquí la tabla tiene un papel fundamental ya que usa una serie de estrategias para lograr un código más fácil de compilar (como por ejemplo la propagación de constantes, que ayuda a resolver redundancias).</text:span></text:p>
      <text:p text:style-name="P65"><text:tab/><text:span text:style-name="T21">Ya llegando a la última fase del proceso de compilación, en dónde se genera el código máquina, la tabla sigue teniendo un rol determinante, ya que es la que permite que el código se aplique al hardware, indicando posiciones de memoria y valores de variables, constantes o funciones.</text:span></text:p>
      <text:p text:style-name="P66"><text:tab/>En conclusión, la tabla es fundamental en todo el proceso de compilación en distintas maneras. Vale también aclarar que, por más que haya dividido el ciclo de vida de la tabla en 2 partes, esto no implica que en la segunda parte del ciclo la tabla ya no se modifique, es solo que la frecuencia en que lo hace es mucho menor y menos significativa. </text:p>
      <text:p text:style-name="P67"/>
      <text:p text:style-name="P68">Ejercicio 1.1<text:span text:style-name="T22">6:</text:span></text:p>
      <text:p text:style-name="P68"/>
      <text:p text:style-name="P69"><text:tab/>La frase correcta es la A.</text:p>
      <text:p text:style-name="P70"><text:soft-page-break/></text:p>
      <text:p text:style-name="P70"><text:tab/><text:span text:style-name="T22">Esto se debe principalmente a que durante el proceso de análisis sintáctico no se pone el foco en el significado de lo que estoy escribiendo sino en que esté bien escrito, por ejemplo:</text:span></text:p>
      <text:p text:style-name="P70"><text:tab/><text:span text:style-name="T22">int x = “bananas”</text:span></text:p>
      <text:p text:style-name="P71">Por más que se entienda que si se define a x como entero, no puede tomar el valor de “bananas” el análisis sintáctico va a interpretar “se está declarando algo y se le está dando un valor, por mí eso está ok”. Durante el análisis sintáctico van a sonar las alarmas si encontramos cosas como estas: </text:p>
      <text:p text:style-name="P69"><text:tab/>int int x = /</text:p>
      <text:p text:style-name="P71">Ahora la interpretación será “hay dos declaraciones seguidas y, además luego hay dos operaciones seguidas, aquí hay algo que claramente está mal ERROR”.</text:p>
      <text:p text:style-name="P71"><text:tab/>Por otro lado, durante el análisis semántico, se pone el foco en que las cosas que se escriben tengan sentido. Volviendo al ejemplo anterior, si yo le digo al sistema:</text:p>
      <text:p text:style-name="P71"><text:tab/>int x = “bananas” </text:p>
      <text:p text:style-name="P71">durante esta fase, me arrojará un fallo bajo la perspectiva de “si x está definida como un entero, entonces es erróneo que se le asigne una cadena de caracteres ERROR”. Teniendo esto en cuenta, la compatibilidad de tipos, el alcance de las variables y la signatura de las funciones son todos conceptos que responden al significado del código y no a si su estructura está bien escrita o bien definida.</text:p>
      <text:p text:style-name="P72"><text:tab/></text:p>
      <text:p text:style-name="P73"/>
      <text:p text:style-name="P74">Ejercicio 1.17:</text:p>
      <text:p text:style-name="P74"/>
      <text:list text:style-name="L8">
        <text:list-item>
          <text:p text:style-name="P75">Compilados: </text:p>
          <text:list>
            <text:list-item>
              <text:p text:style-name="P76">C</text:p>
            </text:list-item>
            <text:list-item>
              <text:p text:style-name="P76">C++</text:p>
            </text:list-item>
            <text:list-item>
              <text:p text:style-name="P76">COBOL</text:p>
            </text:list-item>
            <text:list-item>
              <text:p text:style-name="P76">Fortran</text:p>
            </text:list-item>
            <text:list-item>
              <text:p text:style-name="P76">Haskell*</text:p>
            </text:list-item>
            <text:list-item>
              <text:p text:style-name="P76">Pascal</text:p>
            </text:list-item>
          </text:list>
          <text:p text:style-name="P76"/>
        </text:list-item>
        <text:list-item>
          <text:p text:style-name="P76">Interpretados: </text:p>
          <text:list>
            <text:list-item>
              <text:p text:style-name="P76">Haskell*</text:p>
            </text:list-item>
            <text:list-item>
              <text:p text:style-name="P76">Python</text:p>
              <text:p text:style-name="P76"/>
            </text:list-item>
          </text:list>
        </text:list-item>
        <text:list-item>
          <text:p text:style-name="P76">Híbridos:</text:p>
          <text:list>
            <text:list-item>
              <text:p text:style-name="P76">Java</text:p>
            </text:list-item>
            <text:list-item>
              <text:p text:style-name="P76">Perl</text:p>
            </text:list-item>
            <text:list-item>
              <text:p text:style-name="P76">PHP</text:p>
            </text:list-item>
            <text:list-item>
              <text:p text:style-name="P76">Scala</text:p>
            </text:list-item>
          </text:list>
        </text:list-item>
      </text:list>
      <text:p text:style-name="P77"/>
      <text:p text:style-name="P78"><text:tab/>*Vale aclarar que Haskell es un caso especial ya que posee un compilador y un intérprete, aunque no usa ambos en <text:soft-page-break/>su proceso de compilación por lo que no se lo puede considerar híbrido (hace o una cosa o la otra, pero no ambas al mismo tiempo).</text:p>
      <text:p text:style-name="P79"/>
      <text:p text:style-name="P79"/>
      <text:p text:style-name="P80">Ejercicio 1.18:</text:p>
      <text:p text:style-name="P80"/>
      <text:p text:style-name="P81"><text:tab/>Una variable se define como una entidad identificada por un nombre, asociada a una dirección de memoria, un tipo de dato,un valor, un ámbito y un tiempo de vida.</text:p>
      <text:p text:style-name="P82"><text:tab/>Es un identificador asociado a una posición de memoria capaz de almacenar un valor de un tipo determinado, con un ámbito de visibilidad y un tiempo de vida definidos durante la ejecución del programa.</text:p>
      <text:p text:style-name="P83"/>
      <text:p text:style-name="P83"/>
      <text:p text:style-name="P80">Ejercicio 1.<text:span text:style-name="T23">19</text:span><text:span text:style-name="T24">:</text:span></text:p>
      <text:p text:style-name="P80"/>
      <text:p text:style-name="P84"><text:tab/><text:span text:style-name="T24">Respuesta correcta: C</text:span></text:p>
      <text:p text:style-name="P85"><text:tab/></text:p>
      <text:p text:style-name="P85"><text:tab/><text:span text:style-name="T23">Un tipo describe un conjunto de valores definidos, es decir un dominio, y sobre este dominio se define una serie de operaciones que tienen sentido y se relaciona con los valores descritos por este dominio. Si solo se le asignara un conjunto de valores posibles (sin establecer operaciones predefinidas) no tendría sentido hacer el análisis semántico y se podrían permitir cosas como: </text:span></text:p>
      <text:p text:style-name="P85"><text:tab/><text:span text:style-name="T23">var x = 5 / “casa”</text:span></text:p>
      <text:p text:style-name="P86">Ni bien algunos lenguajes tienen cierta flexibilidad en este sentido (te estoy mirando a vos JavaScript), siempre se mantiene una estructura con respecto a qué se puede hacer y que no (por muy laxa que sea).</text:p>
      <text:p text:style-name="P80"/>
      <text:p text:style-name="P80"/>
      <text:p text:style-name="P87">Ejercicio 1.<text:span text:style-name="T25">20</text:span><text:span text:style-name="T24">:</text:span></text:p>
      <text:p text:style-name="P87"/>
      <text:p text:style-name="P88"><text:tab/><text:span text:style-name="T25">Este tema se tocó con profundidad en el ejercicio 1.16, pero, en resumen se puede decir que la sintaxis se enfoca en comprobar que lo que está escrito esté bien escrito y siga las reglas del lenguaje, mientras que la semántica se enfoca que lo que está escrito tenga sentido y que no solo sean unos símbolos que, aunque estén “bien” escritos, no signifiquen nada.</text:span></text:p>
      <text:p text:style-name="P89"><text:span text:style-name="T26"><text:tab/></text:span><text:span text:style-name="T27">Un ejemplo en lenguaje natural de esto sería: "Las ideas verdes incoloras duermen furiosamente.". Para un lenguaje de programación puede ser algo como: </text:span></text:p>
      <text:p text:style-name="P90"><text:tab/>String x = 2/5</text:p>
      <text:p text:style-name="P91"/>
      <text:p text:style-name="P92">Ejercicio 1.<text:span text:style-name="T25">2</text:span><text:span text:style-name="T28">1</text:span><text:span text:style-name="T24">:</text:span></text:p>
      <text:p text:style-name="P92"/>
      <text:p text:style-name="P93"><text:soft-page-break/><text:tab/><text:span text:style-name="T28">Tipado estático: Esto se refiere a en que momento se le asigna un tipo a una entidad. En el mundo de los lenguajes de programación hay dos instancias de tiempo clave: el tiempo de compilación y el tiempo de ejecución. El tipado estático hace referencia a que esta asignación antes mencionada sucede en tiempo de compilación, el programa antes de ejecutarse ya tiene clara la relación entre el tipo que será la entidad y que identificador tendrá.</text:span></text:p>
      <text:p text:style-name="P93"><text:tab/><text:span text:style-name="T28">Ejemplos de lenguajes que poseen este tipo de tipado son: C, C++ y Java</text:span></text:p>
      <text:p text:style-name="P94"/>
      <text:p text:style-name="P92"/>
      <text:p text:style-name="P92">Ejercicio 1.<text:span text:style-name="T25">2</text:span><text:span text:style-name="T28">2</text:span><text:span text:style-name="T24">:</text:span></text:p>
      <text:p text:style-name="P92"/>
      <text:p text:style-name="P95"><text:tab/>Tipado dinámico: Por otro lado, el tipado estático realiza estas comprobaciones en tiempo de ejecución (runtime) lo que permite mayor flexibilidad (las entidades pueden cambiar de tipo durante la ejecución) pagando como costo robustez y estabilidad de código.</text:p>
      <text:p text:style-name="P96"><text:tab/>Ejemp<text:span text:style-name="T29">l</text:span>os de lenguajes con este tipado son: Python, JavaScript y Prolog</text:p>
      <text:p text:style-name="P96"/>
      <text:p text:style-name="P96"/>
      <text:p text:style-name="P97">Ejercicio 1.23:</text:p>
      <text:p text:style-name="P97"/>
      <text:list text:style-name="L9">
        <text:list-item>
          <text:p text:style-name="P98">Java: Tipado estático y fuerte</text:p>
        </text:list-item>
        <text:list-item>
          <text:p text:style-name="P99">Python: Tipado dinámico y fuerte</text:p>
        </text:list-item>
        <text:list-item>
          <text:p text:style-name="P99">Prolog: Tipado dinámico y fuerte</text:p>
        </text:list-item>
        <text:list-item>
          <text:p text:style-name="P99">Haskell: Estático y fuerte</text:p>
        </text:list-item>
      </text:list>
      <text:p text:style-name="P100"/>
      <text:p text:style-name="P101"/>
      <text:p text:style-name="P101">Ejercicio 1.24:</text:p>
      <text:p text:style-name="P102"/>
      <text:p text:style-name="P103">Un lenguaje tiene tipado fuerte cuando no permite las operaciones entre distintos tipos. Es conveniente pensarlo como un gradiente más que como dos puntos discretos, hay lenguajes mas fuertes o más débiles que otros. Por ejemplo, Java es un lenguaje muy estricto en cuanto que operaciones te deja hacer cuando hay entidades de diferentes tipos, por ejemplo, si yo trato de dividir un entero entre un string, va a saltar un error catastrófico, mientras que JavaScript me deja tranquilamente sumar un string con un entero y simplemente lo concatena. </text:p>
      <text:p text:style-name="P104"/>
      <text:p text:style-name="P104"><text:span text:style-name="T30"><text:tab/># </text:span>Operación <text:span text:style-name="T30">implícita</text:span> (Falla y detiene el programa )</text:p>
      <text:p text:style-name="P104"/>
      <text:p text:style-name="P104"><text:tab/>edad = 25 </text:p>
      <text:p text:style-name="P104"><text:tab/>texto = "Tengo␣"</text:p>
      <text:p text:style-name="P104"><text:tab/>resultado = texto + edad</text:p>
      <text:p text:style-name="P105"><text:soft-page-break/><text:span text:style-name="T30"><text:tab/># </text:span>Genera TypeError : can only concatenate str to <text:span text:style-name="T30">s</text:span>tr</text:p>
      <text:p text:style-name="P105"/>
      <text:p text:style-name="P105"><text:span text:style-name="T30"><text:tab/># </text:span>Operación <text:span text:style-name="T30">explícita</text:span> (Funciona c<text:span text:style-name="T30">o</text:span>rrectament<text:span text:style-name="T30">e</text:span>)</text:p>
      <text:p text:style-name="P104"><text:tab/>resultado = texto + str (edad) </text:p>
      <text:p text:style-name="P104"><text:tab/>print (resultado) </text:p>
      <text:p text:style-name="P104"/>
      <text:p text:style-name="P104"><text:tab/># Salida : Tengo 25</text:p>
      <text:p text:style-name="P105"><text:tab/></text:p>
      <text:p text:style-name="P105"/>
      <text:p text:style-name="P106">Ejercicio 1.2<text:span text:style-name="T31">5</text:span>:</text:p>
      <text:p text:style-name="P106"/>
      <text:p text:style-name="P107"><text:tab/><text:span text:style-name="T31">La característica principal de los lenguajes de tipado fuerte es que no permiten operaciones no compatibles entre tipos, al menos de forma implícita y ahí esta el secreto. Esto aporta kilos de seguridad estructural y robustez pero a expensas de poca flexibilidad y menor facilidad de desarrollo. Por motivos de practicidad y para facilitarle la vida a los desarrolladores (gracias), muchos de los lenguajes fuertemente tipados permiten especificar si en algún momento se desea realizar una operación entre 2 tipos “incompatibles”. La forma de lograrlo, generalmente, es creando un </text:span><text:span text:style-name="T32">valor</text:span><text:span text:style-name="T31"> “temporal” en otra posición de memoria que si sea del tipo necesario para realizar la operación, a este procedimiento se lo suele llamar “casteo”. Un ejemplo:</text:span></text:p>
      <text:p text:style-name="P108"/>
      <text:p text:style-name="P108"><text:tab/><text:span text:style-name="T31">String presentacion = “Me llamo Juan y tengo “</text:span></text:p>
      <text:p text:style-name="P109"><text:tab/>Int edad = 27</text:p>
      <text:p text:style-name="P109"><text:tab/>String saludo = presentacion + (str) edad + “ años” <text:s/></text:p>
      <text:p text:style-name="P109"/>
      <text:p text:style-name="P109"/>
      <text:p text:style-name="P110">Ejercicio 1.26:</text:p>
      <text:p text:style-name="P110"/>
      <text:p text:style-name="P111"><text:tab/>Claramente el concepto de ligadura esta fuertemente relacionado con la semántica del lenguaje. Reiteradas veces durante el práctico se ha puesto énfasis en que el foco de la sintaxis está en que se cumpla la estructura y la “gramática” del lenguaje mientras que la semántica se encarga de que las cosas tengan sentido. Esto produce que, naturalmente, las ligaduras estén relacionadas íntimamente con el sentido de las cosas. Vale aclarar que la pregunta es un poco ambigua, ya que el concepto de ligadura está presente en todas las fases de un lenguaje de programación, pero aún así, tiene más sentido posicionarse más del lado de la semántica.</text:p>
      <text:p text:style-name="P112"/>
      <text:p text:style-name="P112"/>
      <text:p text:style-name="P110">Ejercicio 1.27:</text:p>
      <text:p text:style-name="P110"/>
      <text:p text:style-name="P111"><text:tab/>La respuesta incorrecta es la B</text:p>
      <text:p text:style-name="P112"><text:tab/></text:p>
      <text:p text:style-name="P112"><text:soft-page-break/><text:tab/>Esto está asociado fuertemente a la respuesta anterior. Los conceptos de “valores”, “tipos”, “tiempos de vida”, “scopes”, etc. son <text:span text:style-name="T33">propios de “qué significan” las entidades. Esta enfoque basado en la naturaleza y la definición de las entidades es propio de un análisis semántico y no sintáctico.</text:span></text:p>
      <text:p text:style-name="P112"/>
      <text:p text:style-name="P112"/>
      <text:p text:style-name="P113">Ejercicio 1.2<text:span text:style-name="T33">8</text:span>:</text:p>
      <text:p text:style-name="P113"/>
      <text:p text:style-name="P114"><text:tab/>Si la ligadura es estática o dinámica depende exclusivamente del momento en que ocurre dentro del ciclo de vida del programa. Como detallamos con anterioridad, existen dos fases principales: la compilación y la ejecución (runtime). Si el lenguaje fija estas ligaduras (como el tipo de dato o la ubicación en memoria) en tiempo de compilación, se dice que el lenguaje tiene ligadura estática (ej: C o Java). Por el contrario, si esta resolución se pospone hasta el tiempo de ejecución, permitiendo mayor flexibilidad, se dice que tiene ligadura dinámica (ej: Python o JavaScript).</text:p>
      <text:p text:style-name="P114"/>
      <text:p text:style-name="P115"/>
      <text:p text:style-name="P116">Ejercicio 1.29:</text:p>
      <text:p text:style-name="P116"/>
      <text:p text:style-name="P117"><text:tab/>FALSO</text:p>
      <text:p text:style-name="P118"><text:tab/></text:p>
      <text:p text:style-name="P118"><text:tab/>Es poco claro pensar a que se refiere la pregunta con “tiempo de implementación” pero lo vamos a interpretar como runtime. Aún teniendo en cuenta esta distinción hay varias cosas que están mal con esta afirmación. Las ligadura de nombre de una variable puede no ser estática y estar definida en tiempo de ejecución (JavaScript), pero aún fuese así, si la ligadura fuese estática, no podría ocurrir en tiempo de ejecución, por definición debería ocurrir en tiempo de compilación.</text:p>
      <text:p text:style-name="P118"/>
      <text:p text:style-name="P118"/>
      <text:p text:style-name="P116">Ejercicio 1.3<text:span text:style-name="T34">0:</text:span></text:p>
      <text:p text:style-name="P116"/>
      <text:p text:style-name="P117"><text:tab/><text:span text:style-name="T34">FALSO</text:span></text:p>
      <text:p text:style-name="P118"/>
      <text:p text:style-name="P118"><text:tab/><text:span text:style-name="T34">En ambos lenguajes sus ligaduras de </text:span><text:span text:style-name="T35">valores</text:span><text:span text:style-name="T34"> son dinámicas. Esto es debido a que tanto Java como Python manejan sus “variables” como valores mutables. Esto implica que al lenguaje le es imposible determinar de antemano que valor va a tener la variable al momento de ejecutarse </text:span><text:span text:style-name="T35">o como va a ir cambiando a lo largo de su ciclo de vida, por ende, no queda otra opción que evaluarlo en runtime. Lo que no quiere decir que inmutabilidad (como constantes por ejemplo) necesariamente lleve a ligaduras de </text:span><text:span text:style-name="T36">valores</text:span><text:span text:style-name="T35"> en tiempos de compilación (Haskell) pero si la permite, ya que el lenguaje </text:span><text:soft-page-break/><text:span text:style-name="T35">puede saber de antemano que tipo y que valor van a ser asignados a esa posición de memoria y también sabe que no va a cambiar en el futuro.</text:span></text:p>
      <text:p text:style-name="P118"/>
      <text:p text:style-name="P116"/>
      <text:p text:style-name="P119">Ejercicio 1.3<text:span text:style-name="T37">1</text:span><text:span text:style-name="T34">:</text:span></text:p>
      <text:p text:style-name="P119"/>
      <text:list text:style-name="L10">
        <text:list-item>
          <text:p text:style-name="P120">Ligadura explícita: Es cuando el programador especifica deliberadamente el tipo que tendrá una variable en el código fuente:<text:line-break/>int x = 3<text:line-break/>Esto le aporta información al lenguaje y le clarifica desde el vamos las características de la variable.<text:line-break/></text:p>
        </text:list-item>
        <text:list-item>
          <text:p text:style-name="P121">Ligadura implícita: Aquí se le deja el trabajo sucio al compilador o intérprete. El programador no especifica de qué tipo es la variable declarada y da lugar a que el compilador o intérprete infiera el tipo de la misma.<text:line-break/>var x = “Hola, mundo!”<text:line-break/></text:p>
        </text:list-item>
      </text:list>
      <text:p text:style-name="P122">Algunos lenguajes son más eficientes a la hora de inferir el tipo de una variable que otros. Este proceso se puede hacer en tiempo de compilación o runtime.</text:p>
      <text:p text:style-name="P123"/>
      <text:p text:style-name="P123"/>
      <text:p text:style-name="P119">Ejercicio 1.3<text:span text:style-name="T37">2</text:span><text:span text:style-name="T34">:</text:span></text:p>
      <text:p text:style-name="P119"/>
      <text:p text:style-name="P124"><text:tab/><text:span text:style-name="T37">Los lenguajes de dominio son lenguajes que se desempeñan excepcionalmente bien en una tarea específica pero que en la generalidad de las demandas pueden ser menos prácticos o eficientes que otras alternativas. Sus dominios de aplicación son acotados y, generalmente están atados a ámbitos específicos. Ejemplos de estos lenguajes son: SQL, HTML o MATLAB.</text:span></text:p>
      <text:p text:style-name="P125"><text:tab/><text:span text:style-name="T37">Por otro lado, los lenguajes de propósito general son buenos en la mayoría de las tareas y se adaptan al contexto de dónde están siendo aplicados. Esta versatilidad hace que, en tareas específicas, sea altamente probable que existan mejores alternativas (jack of all tra</text:span><text:span text:style-name="T38">des</text:span><text:span text:style-name="T37">, master of none). </text:span><text:span text:style-name="T38">Por ejemplo, se puede usar Java para aplicar algoritmos de integración o para imprimir gráficos, pero MATLAB siempre va a ser mucho mejor en varios sentidos. Algunos lenguajes de propósito general son: Java, Python o Ruby.</text:span></text:p>
      <text:p text:style-name="P125"><text:tab/><text:span text:style-name="T38">Aclaración: Hay lenguajes de propósito general que se desempeñan especialmente bien en áreas específicas. Esto es, principalmente, porque generalmente son lenguajes muy completos y con muchas herramientas que los hacen muy versátiles. Un ejemplo de esto puede ser JavaScript, un lenguaje de propósito general que tiene un dominio muy específico, la web.</text:span></text:p>
      <text:p text:style-name="P125"><text:soft-page-break/></text:p>
      <text:p text:style-name="P119">Ejercicio 1.33:</text:p>
      <text:p text:style-name="P125"/>
      <text:p text:style-name="P126"><text:tab/>Los lenguajes de dominio tienen las siguientes características:</text:p>
      <text:p text:style-name="P127"/>
      <text:list text:style-name="L11">
        <text:list-item>
          <text:p text:style-name="P128">Tienen alta expresividad en un dominio en particular</text:p>
        </text:list-item>
        <text:list-item>
          <text:p text:style-name="P128">Tienen menor generalidad</text:p>
        </text:list-item>
        <text:list-item>
          <text:p text:style-name="P128">Tienen una sintaxis/semántica enfocada</text:p>
        </text:list-item>
        <text:list-item>
          <text:p text:style-name="P128">Pueden ser externos (SQL <text:span text:style-name="T39">o</text:span> <text:span text:style-name="T39">HTML</text:span>) <text:span text:style-name="T39">o embebidos (mini DSL en Python)</text:span></text:p>
        </text:list-item>
      </text:list>
      <text:p text:style-name="P129"/>
      <text:p text:style-name="P129"/>
      <text:p text:style-name="P129">Ejercicio 1.3<text:span text:style-name="T39">4</text:span>:</text:p>
      <text:p text:style-name="P129"/>
      <text:p text:style-name="P130"><text:tab/>Los lenguajes de scripting tienen las siguientes características:</text:p>
      <text:p text:style-name="P131"/>
      <text:list text:style-name="L12">
        <text:list-item>
          <text:p text:style-name="P132">Se utilizan para automatizar tareas, “pegar” componentes y orquestar herramientas.</text:p>
        </text:list-item>
        <text:list-item>
          <text:p text:style-name="P132">Priorizan la rapidez de desarrollo.</text:p>
        </text:list-item>
        <text:list-item>
          <text:p text:style-name="P132">Son flexibles (tipado dinámico).</text:p>
        </text:list-item>
        <text:list-item>
          <text:p text:style-name="P132">Tienen una fuerte integración con el OS y librerías</text:p>
        </text:list-item>
        <text:list-item>
          <text:p text:style-name="P132">Normalmente son interpretados o con runtime (ocasionalmente pueden tener JIT)<text:line-break/></text:p>
        </text:list-item>
        <text:list-item>
          <text:p text:style-name="P132">Ejemplos pueden ser: </text:p>
          <text:list>
            <text:list-item>
              <text:p text:style-name="P132">Bash</text:p>
            </text:list-item>
            <text:list-item>
              <text:p text:style-name="P132">Python</text:p>
            </text:list-item>
            <text:list-item>
              <text:p text:style-name="P132">JavaScript (Node.js)</text:p>
            </text:list-item>
            <text:list-item>
              <text:p text:style-name="P132">Lua</text:p>
            </text:list-item>
            <text:list-item>
              <text:p text:style-name="P132">Perl/Ruby</text:p>
            </text:list-item>
          </text:list>
        </text:list-item>
      </text:list>
      <text:p text:style-name="P133"/>
      <text:p text:style-name="P133"/>
      <text:p text:style-name="P134">Ejercicio 1.3<text:span text:style-name="T39">5</text:span>:</text:p>
      <text:p text:style-name="P135"/>
      <text:p text:style-name="P136"><text:span text:style-name="T40"><text:tab/></text:span>Los lenguajes de pegamento (glue languages) son lenguajes, generalmente de scripting, diseñados específicamente para conectar, integrar y orquestar diferentes componentes de software, herramientas del sistema o bloques de código escritos en otros lenguajes.</text:p>
      <text:p text:style-name="P137">Actúan como un puente o interfaz que permite que piezas de software incompatibles se comuniquen entre sí. Un ejemplo clásico en la industria es usar Python como pegamento para orquestar un programa: el desarrollador escribe la lógica de alto nivel en Python de forma rápida y sencilla, y este script se encarga de llamar y pasarle parámetros a módulos de alta complejidad matemática que fueron escritos y <text:soft-page-break/>precompilados en C o C++ para aprovechar su máximo rendimiento.</text:p>
      <text:p text:style-name="P138"/>
      <text:p text:style-name="P139">Ejercicio 1.3<text:span text:style-name="T41">6</text:span>:</text:p>
      <text:p text:style-name="P139"/>
      <text:p text:style-name="P140"><text:span text:style-name="T41"><text:tab/>La principal diferencia entre los lenguajes de dominio externos e internos reside en su analizador sintáctico. Mientras que lenguajes como SQL tienen su propio analizador sintáctico (es decir, su propio compilador, son lenguajes independientes), otros DSL que “viven dentro” de otros lenguajes dependen totalmente del analizador sintáctico del lenguaje madre, aunque exploten su analizador sintáctico </text:span><text:span text:style-name="T42">y la flexibilidad de su sintaxis</text:span><text:span text:style-name="T41"> hasta el punto que parecen otro </text:span><text:span text:style-name="T42">casi</text:span><text:span text:style-name="T41"> lenguaje directamente.</text:span></text:p>
      <text:p text:style-name="P139"/>
      <text:list text:style-name="L13">
        <text:list-item>
          <text:p text:style-name="P141">Lenguajes de dominio externos:<text:line-break/></text:p>
          <text:list>
            <text:list-item>
              <text:p text:style-name="P142">SQL: Se enfoca en consulta y manipulaciones de bases de datos.<text:line-break/>Posee gramática y sintaxis completamente propias.</text:p>
            </text:list-item>
            <text:list-item>
              <text:p text:style-name="P142">CSS (cascade style sheet): Se encarga de brindar diseño y estilización visual de documentos (generalmente HTML).<text:line-break/>Su sintaxis basada en selectores y bloques de declaración es totalmente independiente.</text:p>
            </text:list-item>
            <text:list-item>
              <text:p text:style-name="P142">RegEx (Regular Expressions): Su principal función es la búsqueda y manipulación de patrones de texto.<text:line-break/>Aunque se suele implementar “dentro” de otros lenguajes, RegEx es un lenguaje externo en sí mismo. Su sintaxis es completamente ajena al lenguaje anfitrión.<text:line-break/></text:p>
            </text:list-item>
          </text:list>
        </text:list-item>
        <text:list-item>
          <text:p text:style-name="P142">Lenguajes de dominio embebidos:<text:line-break/></text:p>
          <text:list>
            <text:list-item>
              <text:p text:style-name="P142">LINQ (Language Integrated Query) – C#: Se usa principalmente en consultas y filtrado de colecciones de datos (listas, bases de datos , XML).<text:line-break/>Aunque permite hacer consultas muy parecidas a las de SQL, en realidad es código en C# 100% válido.</text:p>
            </text:list-item>
            <text:list-item>
              <text:p text:style-name="P142">Jest (o Mocha/Chai) – JavaScript: Su principal función es la automatización de pruebas (testing).<text:line-break/>Parece inglés estructurado para testing, pero en realidad no hay un compilador nuevo, solo son funciones estándar de JavaScript.</text:p>
            </text:list-item>
            <text:list-item>
              <text:p text:style-name="P142">SQLAlchemy – Python: Se enfoca en el Mapeo Objeto-Relacional (ORM por sus siglas en inglés).<text:line-break/><text:span text:style-name="T42">Este DSL permite definir la estructura de una base de datos usando clases y métodos del lenguaje anfitrión.</text:span></text:p>
            </text:list-item>
          </text:list>
        </text:list-item>
      </text:list>
      <text:p text:style-name="P143"/>
      <text:p text:style-name="P143"><text:soft-page-break/></text:p>
      <text:p text:style-name="P144">Ejercicio 1.37:</text:p>
      <text:p text:style-name="P144"/>
      <text:p text:style-name="P145"><text:tab/>Ni bien los lenguajes de scripting “pueden” ser compilados, no conviene por varios motivos.</text:p>
      <text:p text:style-name="P146"><text:tab/><text:span text:style-name="T43">Primeramente, los lenguajes de scripting priorizan la flexibilidad y la rapidez para implementarlos o modificarlos. Si cada vez que quiero hacer una modificación tengo que recompilar todo el código, termina siendo algo altamente ineficiente y consumiendo más <text:s/>tiempo del que nos ahorra.</text:span></text:p>
      <text:p text:style-name="P146"><text:tab/><text:span text:style-name="T43">Por otro lado, el hecho de que el lenguaje tenga un tipado dinámico ayuda mucho a la hora de ser usado como “pegamento” entre 2 lenguajes. Tiene que poder adaptarse y configurarse en función de lo que reciba.</text:span></text:p>
      <text:p text:style-name="P146"><text:tab/><text:span text:style-name="T43">Otro gran requerimiento que tienen estos lenguajes es que deben ser portátiles, lo cual convierte a los intérpretes en herramientas geniales multiplataforma que ayudan a que los scripts corran en múltiples plataformas con un mínimo de esfuerzo.</text:span></text:p>
      <text:p text:style-name="P146"/>
      <text:p text:style-name="P147"/>
      <text:p text:style-name="P148">Ejercicio 1.37:</text:p>
      <text:p text:style-name="P148"/>
      <text:h text:style-name="P149" text:outline-level="3"><text:span text:style-name="T43">1</text:span>. Python en Ansible (Automatización y Orquestación)</text:h>
      <text:list text:style-name="L14">
        <text:list-item>
          <text:p text:style-name="P150"><text:span text:style-name="T44">Dominio:</text:span> Administración de sistemas e Infraestructura como Código (IaC).</text:p>
        </text:list-item>
        <text:list-item>
          <text:p text:style-name="P150"><text:span text:style-name="T44">Justificación:</text:span> Ansible es una de las herramientas más usadas para configurar miles de servidores en segundos. Utiliza <text:span text:style-name="T44">Python</text:span> como motor de scripting. Los administradores escriben reglas en archivos simples, y Ansible ejecuta scripts de Python en los servidores remotos para instalar software, actualizar parches o configurar redes. Se elige Python por su enorme cantidad de librerías de sistema y su facilidad para ser leído por humanos.</text:p>
        </text:list-item>
      </text:list>
      <text:h text:style-name="P151" text:outline-level="3">2. JavaScript (V8) en MongoDB (Administración de Bases de Datos)</text:h>
      <text:list text:style-name="L15">
        <text:list-item>
          <text:p text:style-name="P152"><text:span text:style-name="T44">Dominio:</text:span> Web y gestión de datos NoSQL.</text:p>
        </text:list-item>
        <text:list-item>
          <text:p text:style-name="P152"><text:span text:style-name="T44">Justificación:</text:span> MongoDB, una de las bases de datos más populares para la web moderna, integra un motor de <text:span text:style-name="T44">JavaScript</text:span> (el motor V8 de Google). Esto permite a los desarrolladores y administradores realizar tareas de mantenimiento, migraciones de datos o cálculos complejos directamente en la consola de la base de datos usando <text:soft-page-break/>sintaxis de JS. En lugar de usar un lenguaje de consulta rígido, usás un lenguaje de scripting para manipular los datos como si fueran objetos de programación.</text:p>
        </text:list-item>
      </text:list>
      <text:p text:style-name="P148"/>
      <text:p text:style-name="P148"/>
      <text:p text:style-name="P153">Ejercicio 1.<text:span text:style-name="T45">39</text:span>:</text:p>
      <text:p text:style-name="P153"/>
      <text:p text:style-name="P154"><text:tab/>Los lenguajes de scripting son excelentes como "pegamento" porque las mismas características técnicas que los hacen ágiles para automatizar tareas son exactamente las que se necesitan para conectar sistemas incompatibles. Por un lado, su profunda integración con el sistema operativo permite orquestar subprocesos y manejar redes o archivos con muy pocas líneas de código. Además, destacan enormemente en la manipulación de texto plano (usualmente mediante expresiones regulares), que es el formato universal en el que la mayoría de los programas independientes emiten y reciben su información.</text:p>
      <text:p text:style-name="P155"><text:tab/>Por otro lado, su diseño interpretado y de tipado dinámico brinda una flexibilidad crucial para la integración. Al no exigir estructuras de datos rígidas ni tiempos de compilación, el programador puede desarrollar este "puente" mediante prueba y error de forma casi instantánea. Así, el lenguaje puede atrapar cualquier dato sobre la marcha, transformarlo y enviarlo a su nuevo destino, uniendo herramientas complejas sin la fricción que impondría un lenguaje de tipado estático tradicional.</text:p>
      <text:p text:style-name="P156"/>
      <text:p text:style-name="P153">Ejercicio 1.<text:span text:style-name="T45">40</text:span>:</text:p>
      <text:p text:style-name="P153"/>
      <text:p text:style-name="P157"><text:tab/>La menor eficiencia de los lenguajes de scripting frente a los compilados es una realidad técnica, no un mito. Los lenguajes compilados (como C o Rust) traducen el código directamente a instrucciones de máquina antes de la ejecución, permitiendo que el procesador trabaje a máxima velocidad y sin intermediarios. En contraste, los lenguajes de scripting (como Python o Ruby) dependen de un intérprete que lee y evalúa el código en tiempo real. Este intermediario genera una sobrecarga computacional lógica, pero responde a una decisión de diseño intencional: se sacrifica la velocidad de la máquina para optimizar la flexibilidad y el tiempo del programador.</text:p>
      <text:p text:style-name="P155"><text:soft-page-break/><text:tab/>En el caso de Python, esta filosofía se refleja en decisiones de diseño que priorizan la simplicidad a costa del rendimiento. El tipado dinámico, por ejemplo, permite que una variable cambie de tipo libremente, pero obliga al intérprete a comprobar constantemente la naturaleza del dato antes de operarlo. De manera similar, características como el duck typing requieren buscar métodos en diccionarios internos en pleno <text:span text:style-name="T46">runtime</text:span>, y la recolección automática de basura libera al desarrollador de gestionar la memoria manualmente, a cambio de consumir ciclos de procesamiento en segundo plano.</text:p>
      <text:p text:style-name="P155">En definitiva, la pérdida de eficiencia computacional es el precio que se paga por un nivel de abstracción más alto. Mientras que los lenguajes de bajo nivel están optimizados para comunicarse de forma directa y estricta con el hardware, los lenguajes de scripting están diseñados para facilitar la lógica humana, permitiendo escribir, modificar y mantener sistemas complejos con mucha mayor rapidez.</text:p>
      <text:p text:style-name="P158"/>
      <text:p text:style-name="P158"/>
      <text:p text:style-name="P153">Ejercicio 1.<text:span text:style-name="T45">41</text:span>:</text:p>
      <text:p text:style-name="P159"/>
      <text:p text:style-name="P160">import re</text:p>
      <text:p text:style-name="P161">class MiniInterprete: def init(self, texto):</text:p>
      <text:p text:style-name="P161"> # 1. LEXER: Limpiamos espacios y separamos en tokens (números u operadores)</text:p>
      <text:p text:style-name="P161"> texto_limpio = texto.replace(" ", "") </text:p>
      <text:p text:style-name="P161"># Esta expresión regular atrapa números enteros o cualquier símbolo matemático</text:p>
      <text:p text:style-name="P161">self.tokens = re.findall(r'\d+|[+/*()-]', texto_limpio) self.pos = 0</text:p>
      <text:p text:style-name="P162">def token_actual(self):<text:line-break/> <text:s text:c="3"/>"""Devuelve el token actual sin consumirlo."""<text:line-break/> <text:s text:c="3"/>if self.pos &lt; len(self.tokens):<text:line-break/> <text:s text:c="7"/>return self.tokens[self.pos]<text:line-break/> <text:s text:c="3"/>return None<text:line-break/><text:line-break/>def consumir(self):<text:line-break/> <text:s text:c="3"/>"""Devuelve el token actual y avanza a la siguiente posición."""<text:line-break/> <text:s text:c="3"/>token = self.token_actual()<text:line-break/><text:soft-page-break/> <text:s text:c="3"/>self.pos += 1<text:line-break/> <text:s text:c="3"/>return token<text:line-break/><text:line-break/># 2. PARSER Y EVALUADOR (Reglas gramaticales)<text:line-break/><text:line-break/>def factor(self):<text:line-break/> <text:s text:c="3"/>"""Regla de mayor prioridad: Números enteros o paréntesis."""<text:line-break/> <text:s text:c="3"/>token = self.consumir()<text:line-break/> <text:s text:c="3"/><text:line-break/> <text:s text:c="3"/>if token.isdigit():<text:line-break/> <text:s text:c="7"/>return float(token) <text:s/># Si es número, lo convertimos a valor real<text:line-break/> <text:s text:c="3"/>elif token == '(':<text:line-break/> <text:s text:c="7"/>resultado = self.expresion() <text:s/># Evaluamos lo de adentro<text:line-break/> <text:s text:c="7"/>self.consumir() <text:s/># Consumimos el ')'<text:line-break/> <text:s text:c="7"/>return resultado<text:line-break/> <text:s text:c="3"/>else:<text:line-break/> <text:s text:c="7"/>raise ValueError(f"Sintaxis inválida. Token inesperado: {token}")<text:line-break/><text:line-break/>def termino(self):<text:line-break/> <text:s text:c="3"/>"""Regla de prioridad media: Multiplicación y División."""<text:line-break/> <text:s text:c="3"/>resultado = self.factor()<text:line-break/> <text:s text:c="3"/><text:line-break/> <text:s text:c="3"/>while self.token_actual() in ('*', '/'):<text:line-break/> <text:s text:c="7"/>operador = self.consumir()<text:line-break/> <text:s text:c="7"/>if operador == '*':<text:line-break/> <text:s text:c="11"/>resultado *= self.factor()<text:line-break/> <text:s text:c="7"/>elif operador == '/':<text:line-break/> <text:s text:c="11"/>resultado /= self.factor()<text:line-break/> <text:s text:c="11"/><text:line-break/> <text:s text:c="3"/>return resultado<text:line-break/><text:line-break/>def expresion(self):<text:line-break/> <text:s text:c="3"/>"""Regla de prioridad baja: Sumas y Restas."""<text:line-break/> <text:s text:c="3"/>resultado = self.termino()<text:line-break/> <text:s text:c="3"/><text:line-break/> <text:s text:c="3"/>while self.token_actual() in ('+', '-'):<text:line-break/> <text:s text:c="7"/>operador = self.consumir()<text:line-break/> <text:s text:c="7"/>if operador == '+':<text:line-break/> <text:s text:c="11"/>resultado += self.termino()<text:line-break/><text:soft-page-break/> <text:s text:c="7"/>elif operador == '-':<text:line-break/> <text:s text:c="11"/>resultado -= self.termino()<text:line-break/> <text:s text:c="11"/><text:line-break/> <text:s text:c="3"/>return resultado<text:line-break/><text:line-break/>def interpretar(self):<text:line-break/> <text:s text:c="3"/>"""Inicia el proceso de interpretación."""<text:line-break/> <text:s text:c="3"/>return self.expresion()</text:p>
      <text:p text:style-name="P162">--- PRUEBAS ---</text:p>
      <text:p text:style-name="P162">if name == "main": operaciones = [ "2 + 3 * 4", "(2 + 3) * 4", "10 / 2 - 1", "100 * ( 2 + 12 ) / 4" ]</text:p>
      <text:p text:style-name="P162">for op in operaciones:<text:line-break/> <text:s text:c="3"/>interprete = MiniInterprete(op)<text:line-break/> <text:s text:c="3"/>resultado = interprete.interpretar()<text:line-break/> <text:s text:c="3"/>print(f"La operación '{op}' da como resultado: {resultado}")</text:p>
      <text:p text:style-name="P1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upply" svg:font-family="Supply" style:font-pitch="variable"/>
    <style:font-face style:name="Supply1" svg:font-family="Supply"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NF.1"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2"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3"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4"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5"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6"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7"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8"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9"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0"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1"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2"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3"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4"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5"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style:style style:name="AcNF.16" style:family="table-cell">
      <style:table-cell-properties fo:padding="0.0598in" fo:padding-left="0.0598in" fo:padding-right="0.0598in" fo:padding-top="0.0598in" fo:padding-bottom="0.0598in"/>
      <style:text-properties fo:color="#000000" fo:font-size="11pt" style:font-name="Supply" fo:font-family="Supply" style:font-name-asian="Noto Sans" style:font-family-asian="'Noto Sans'" style:font-name-complex="Noto Sans Devanagari" style:font-family-complex="'Noto Sans Devanagari'" style:font-family-generic-complex="swiss"/>
    </style:style>
    <table:table-template table:name="AcNF" table:first-row-end-column="row" table:first-row-start-column="row" table:last-row-end-column="row" table:last-row-start-column="row">
      <table:first-row table:style-name="AcNF.1"/>
      <table:last-row table:style-name="AcNF.2"/>
      <table:first-column table:style-name="AcNF.3"/>
      <table:last-column table:style-name="AcNF.4"/>
      <table:body table:style-name="AcNF.9"/>
      <table:even-rows table:style-name="AcNF.5"/>
      <table:odd-rows table:style-name="AcNF.6"/>
      <table:even-columns table:style-name="AcNF.7"/>
      <table:odd-columns table:style-name="AcNF.8"/>
      <table:background table:style-name="AcNF.10"/>
      <loext:first-row-even-column table:style-name="AcNF.15"/>
      <loext:last-row-even-column table:style-name="AcNF.16"/>
      <loext:first-row-end-column table:style-name="AcNF.12"/>
      <loext:first-row-start-column table:style-name="AcNF.11"/>
      <loext:last-row-end-column table:style-name="AcNF.14"/>
      <loext:last-row-start-column table:style-name="AcNF.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ackground-color="#141414" style:writing-mode="lr-tb" style:layout-grid-color="#c0c0c0" style:layout-grid-lines="20" style:layout-grid-base-height="0.278in" style:layout-grid-ruby-height="0.139in" style:layout-grid-mode="none" style:layout-grid-ruby-below="false" style:layout-grid-print="false" style:layout-grid-display="false" draw:fill="solid" draw:fill-color="#141414"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41414"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14:36.824797643</meta:creation-date>
    <dc:date>2026-04-26T17:43:13.766495844</dc:date>
    <meta:editing-duration>PT6H32M51S</meta:editing-duration>
    <meta:editing-cycles>13</meta:editing-cycles>
    <meta:generator>LibreOffice/26.2.2.2$Linux_X86_64 LibreOffice_project/620$Build-2</meta:generator>
    <meta:document-statistic meta:table-count="2" meta:image-count="0" meta:object-count="0" meta:page-count="22" meta:paragraph-count="307" meta:word-count="6018" meta:character-count="37665" meta:non-whitespace-character-count="31626"/>
  </office:meta>
</office:document-meta>
</file>